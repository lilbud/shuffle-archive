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7756in"/>
    </style:style>
    <style:style style:name="co2" style:family="table-column">
      <style:table-column-properties fo:break-before="auto" style:column-width="1.0862in"/>
    </style:style>
    <style:style style:name="co3" style:family="table-column">
      <style:table-column-properties fo:break-before="auto" style:column-width="1.172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ce1"/>
        <table:table-column table:style-name="co4" table:number-columns-repeated="2" table:default-cell-style-name="ce1"/>
        <table:table-row table:style-name="ro1">
          <table:table-cell office:value-type="string" calcext:value-type="string">
            <text:p>original</text:p>
          </table:table-cell>
          <table:table-cell office:value-type="string" calcext:value-type="string">
            <text:p>mimetype</text:p>
          </table:table-cell>
          <table:table-cell table:style-name="Default" office:value-type="string" calcext:value-type="string">
            <text:p>timestamp</text:p>
          </table:table-cell>
          <table:table-cell table:style-name="Default" office:value-type="string" calcext:value-type="string">
            <text:p>endtimestamp</text:p>
          </table:table-cell>
          <table:table-cell table:style-name="Default" office:value-type="string" calcext:value-type="string">
            <text:p>groupcount</text:p>
          </table:table-cell>
          <table:table-cell table:style-name="Default" office:value-type="string" calcext:value-type="string">
            <text:p>uniqcount</text:p>
          </table:table-cell>
        </table:table-row>
        <table:table-row table:style-name="ro1">
          <table:table-cell office:value-type="string" calcext:value-type="string">
            <text:p>https://estreetshuffle.com/index.php/wp-json/wp/v2/posts/20099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00817153841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19924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00818100908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://estreetshuffle.com/index.php/wp-json/wp/v2/posts/20529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20200820131759</text:p>
          </table:table-cell>
          <table:table-cell office:value-type="string" calcext:value-type="string">
            <text:p>2020091006520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http://estreetshuffle.com/index.php/wp-json/wp/v2/posts/13356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01006042249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17236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01018103531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://estreetshuffle.com/index.php/wp-json/wp/v2/posts/5191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01101211540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21252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01102092430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://estreetshuffle.com/index.php/wp-json/wp/v2/posts/20309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20201016184247</text:p>
          </table:table-cell>
          <table:table-cell office:value-type="string" calcext:value-type="string">
            <text:p>20201102204528</text:p>
          </table:table-cell>
          <table:table-cell table:number-columns-repeated="2"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https://estreetshuffle.com/index.php/wp-json/wp/v2/posts/18166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01103122231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17123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01104005708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16772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01105154707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://estreetshuffle.com/index.php/wp-json/wp/v2/posts/21260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01105175749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21116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01107150651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://estreetshuffle.com/index.php/wp-json/wp/v2/posts/4784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01109232703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://estreetshuffle.com/index.php/wp-json/wp/v2/posts/7412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01111123034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://estreetshuffle.com/index.php/wp-json/wp/v2/posts/16918</text:p>
          </table:table-cell>
          <table:table-cell office:value-type="string" calcext:value-type="string">
            <text:p>text/html</text:p>
          </table:table-cell>
          <table:table-cell table:number-columns-repeated="2" office:value-type="string" calcext:value-type="string">
            <text:p>20201112184502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://estreetshuffle.com/index.php/wp-json/wp/v2/posts/9732</text:p>
          </table:table-cell>
          <table:table-cell office:value-type="string" calcext:value-type="string">
            <text:p>text/html</text:p>
          </table:table-cell>
          <table:table-cell table:number-columns-repeated="2" office:value-type="string" calcext:value-type="string">
            <text:p>20201112215712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://estreetshuffle.com/index.php/wp-json/wp/v2/posts/15484</text:p>
          </table:table-cell>
          <table:table-cell office:value-type="string" calcext:value-type="string">
            <text:p>text/html</text:p>
          </table:table-cell>
          <table:table-cell table:number-columns-repeated="2" office:value-type="string" calcext:value-type="string">
            <text:p>20201112225720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://estreetshuffle.com/index.php/wp-json/wp/v2/posts/20801</text:p>
          </table:table-cell>
          <table:table-cell office:value-type="string" calcext:value-type="string">
            <text:p>text/html</text:p>
          </table:table-cell>
          <table:table-cell table:number-columns-repeated="2" office:value-type="string" calcext:value-type="string">
            <text:p>20201113012314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7786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01113084240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://estreetshuffle.com/index.php/wp-json/wp/v2/posts/2293</text:p>
          </table:table-cell>
          <table:table-cell office:value-type="string" calcext:value-type="string">
            <text:p>text/html</text:p>
          </table:table-cell>
          <table:table-cell table:number-columns-repeated="2" office:value-type="string" calcext:value-type="string">
            <text:p>20201113133511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://estreetshuffle.com/index.php/wp-json/wp/v2/posts/2879</text:p>
          </table:table-cell>
          <table:table-cell office:value-type="string" calcext:value-type="string">
            <text:p>text/html</text:p>
          </table:table-cell>
          <table:table-cell table:number-columns-repeated="2" office:value-type="string" calcext:value-type="string">
            <text:p>20201114092603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://estreetshuffle.com/index.php/wp-json/wp/v2/posts/181</text:p>
          </table:table-cell>
          <table:table-cell office:value-type="string" calcext:value-type="string">
            <text:p>text/html</text:p>
          </table:table-cell>
          <table:table-cell table:number-columns-repeated="2" office:value-type="string" calcext:value-type="string">
            <text:p>20201115060446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21723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01116013053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://estreetshuffle.com/index.php/wp-json/wp/v2/posts/21700</text:p>
          </table:table-cell>
          <table:table-cell office:value-type="string" calcext:value-type="string">
            <text:p>text/html</text:p>
          </table:table-cell>
          <table:table-cell office:value-type="string" calcext:value-type="string">
            <text:p>20201116034332</text:p>
          </table:table-cell>
          <table:table-cell office:value-type="string" calcext:value-type="string">
            <text:p>20201116040158</text:p>
          </table:table-cell>
          <table:table-cell table:number-columns-repeated="2"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https://estreetshuffle.com/index.php/wp-json/wp/v2/posts/22140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01116124411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22426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01116124448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21180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01116131445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22319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01116131452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22342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01116133055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21787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01116133105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22006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01116135958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21730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01116142921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18390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01116142925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22193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01116142927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22772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01116142930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20444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01116143008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22117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01116144451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21956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01116144453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22769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01116152152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22589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01116152959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22583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01116155211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21832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01116161509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22770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01116181501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20116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01116181513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22144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01116181529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22202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01116183049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22408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01116183429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22118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01116190806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22083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01116193825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22471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01116200835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22245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01116200839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21784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01116201648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22492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01116213136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22431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01116213141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22438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01116213143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21387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01117011644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22366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01117011651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22351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01117011655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22068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01117031812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22046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01117031819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22279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01117070246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20931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01117071513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22482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01117080431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22218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01117084941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22537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01117085148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16883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01117090017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21110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01117090628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21253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01117092511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22460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01117153654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22143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01119205543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21384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01119213450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22282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01120044435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22508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01120084729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://estreetshuffle.com/index.php/wp-json/wp/v2/posts/5193</text:p>
          </table:table-cell>
          <table:table-cell office:value-type="string" calcext:value-type="string">
            <text:p>text/html</text:p>
          </table:table-cell>
          <table:table-cell table:number-columns-repeated="2" office:value-type="string" calcext:value-type="string">
            <text:p>20201120110329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://estreetshuffle.com/index.php/wp-json/wp/v2/posts/21460</text:p>
          </table:table-cell>
          <table:table-cell office:value-type="string" calcext:value-type="string">
            <text:p>text/html</text:p>
          </table:table-cell>
          <table:table-cell table:number-columns-repeated="2" office:value-type="string" calcext:value-type="string">
            <text:p>20201122004822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21388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01123050902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22002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01125202616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5687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01130065511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5811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01202212545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24352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10129214009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24435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10129232357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24346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10129233958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23583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10129234358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23803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10130013344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24579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10130014703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16557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10130014934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23584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10130015629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23579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10130024151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22142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10130024504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23951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10130024728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24351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10130033713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24471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10130034729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24345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10130034734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24158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10130034738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23736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10130042416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24149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10130053007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23737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10130065220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23732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10130090200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24155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10130090237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23943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10130100826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23944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10130134628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14213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10130164733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23950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10130180237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23376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10130180240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20933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10130211325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23072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10131000828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13793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10201052508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11795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10203003637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2419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10203004056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303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10203010156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16062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10203022638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12011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10203022648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15625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10203040739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16544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10203092552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24857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10203093927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4444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10203220236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24645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10215172916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18978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10216114322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16357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10216114407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24475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10216131507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6321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10216131949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24473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10216142244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24821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10216142400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17353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10216144318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23581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10216212139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2931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10218002301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17523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10218005711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16360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10218030232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13398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10218031015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25335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10218042127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24823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10218042130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25188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10218042135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25332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10218042138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24827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10218042159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13193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10218061141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25004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10218074059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24150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10218134345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25003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10218211028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24822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10218231752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24272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10219010953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25008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10219011923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25184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10219023331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8417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10219200211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24478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10220001102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24372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10220070658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25221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10220070701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25234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10221082212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25626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10317185806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25806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10323103924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25001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10418021811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26262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10426230909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26495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10426231732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25693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20210427003549</text:p>
          </table:table-cell>
          <table:table-cell office:value-type="string" calcext:value-type="string">
            <text:p>20210427003856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26261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10427004552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25932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10427012318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25807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10427050244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25938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10427055013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25585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10427061013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26375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10427062320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26513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10427072002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26512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10427095613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26454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10427105204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26078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10427121549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26456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10427124756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26450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10427131954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26258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10427140735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26701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10427143518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26076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10427151109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25005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10427152017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26260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10428060629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26453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10428070132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26516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10428073721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26080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10428073724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23378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10429041056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24792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10429134016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24957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10429192657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26497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10430030749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23300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10430035854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23885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10430193451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24932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10430220514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24994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10502041547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26981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10517052606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29739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10928214959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27623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10928222538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29684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10928224046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29317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10928224055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28873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10928225054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28156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10928230732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29629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10928231031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28463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10928231051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29281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10928231057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29632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10928231147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29626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10928231155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28460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10928233826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29617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10928233828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29119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10928233836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28858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10929011414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29538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10929011422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16089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10929011434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29030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10929011446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27712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10929011522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25934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10929021647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29190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10929021650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29803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10929021653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28661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10929023203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29309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10929024710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29185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10929030232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29029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10929030238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29229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10929030303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29026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10929045430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29664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10929045442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29033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10929054342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29313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10929054357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29688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10929054358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28857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10929055859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27624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10929055902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25267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20210429035405</text:p>
          </table:table-cell>
          <table:table-cell office:value-type="string" calcext:value-type="string">
            <text:p>20211115162145</text:p>
          </table:table-cell>
          <table:table-cell table:number-columns-repeated="2"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https://estreetshuffle.com/index.php/wp-json/wp/v2/posts/16217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11118011833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30589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20120114810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13189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20125163548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31939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20125170859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31029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20126021236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30866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20126022910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30734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20126072750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31933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20126082558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31072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20126082648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18172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20126094259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32105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20126094336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31026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20126101352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30067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20128041251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30074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20128051757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32630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20204210922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32623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20204212313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32627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20205120629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32052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20205174812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32620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20205202448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32049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20205202451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32633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20206014815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32251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20220205183325</text:p>
          </table:table-cell>
          <table:table-cell office:value-type="string" calcext:value-type="string">
            <text:p>202202131346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32112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20220126011321</text:p>
          </table:table-cell>
          <table:table-cell office:value-type="string" calcext:value-type="string">
            <text:p>20220213134640</text:p>
          </table:table-cell>
          <table:table-cell table:number-columns-repeated="2"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https://estreetshuffle.com/index.php/wp-json/wp/v2/posts/31751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20220126021119</text:p>
          </table:table-cell>
          <table:table-cell office:value-type="string" calcext:value-type="string">
            <text:p>20220213144717</text:p>
          </table:table-cell>
          <table:table-cell table:number-columns-repeated="2"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https://estreetshuffle.com/index.php/wp-json/wp/v2/posts/31272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20220126094305</text:p>
          </table:table-cell>
          <table:table-cell office:value-type="string" calcext:value-type="string">
            <text:p>20220213144734</text:p>
          </table:table-cell>
          <table:table-cell table:number-columns-repeated="2"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https://estreetshuffle.com/index.php/wp-json/wp/v2/posts/32479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20220125172113</text:p>
          </table:table-cell>
          <table:table-cell office:value-type="string" calcext:value-type="string">
            <text:p>20220213151817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32111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20220126014519</text:p>
          </table:table-cell>
          <table:table-cell office:value-type="string" calcext:value-type="string">
            <text:p>2022021320321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32247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20220126094340</text:p>
          </table:table-cell>
          <table:table-cell office:value-type="string" calcext:value-type="string">
            <text:p>20220213204813</text:p>
          </table:table-cell>
          <table:table-cell table:number-columns-repeated="2"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https://estreetshuffle.com/index.php/wp-json/wp/v2/posts/32253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20220205233426</text:p>
          </table:table-cell>
          <table:table-cell office:value-type="string" calcext:value-type="string">
            <text:p>202202132102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32349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20220126012434</text:p>
          </table:table-cell>
          <table:table-cell office:value-type="string" calcext:value-type="string">
            <text:p>20220213210245</text:p>
          </table:table-cell>
          <table:table-cell table:number-columns-repeated="2"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https://estreetshuffle.com/index.php/wp-json/wp/v2/posts/31068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20220126082604</text:p>
          </table:table-cell>
          <table:table-cell office:value-type="string" calcext:value-type="string">
            <text:p>20220213210309</text:p>
          </table:table-cell>
          <table:table-cell table:number-columns-repeated="2"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https://estreetshuffle.com/index.php/wp-json/wp/v2/posts/25518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20220126092744</text:p>
          </table:table-cell>
          <table:table-cell office:value-type="string" calcext:value-type="string">
            <text:p>20220213210314</text:p>
          </table:table-cell>
          <table:table-cell table:number-columns-repeated="2"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https://estreetshuffle.com/index.php/wp-json/wp/v2/posts/32804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20213210328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32316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20220125235309</text:p>
          </table:table-cell>
          <table:table-cell office:value-type="string" calcext:value-type="string">
            <text:p>20220213210338</text:p>
          </table:table-cell>
          <table:table-cell table:number-columns-repeated="2"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https://estreetshuffle.com/index.php/wp-json/wp/v2/posts/32244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20220128062124</text:p>
          </table:table-cell>
          <table:table-cell office:value-type="string" calcext:value-type="string">
            <text:p>20220213210341</text:p>
          </table:table-cell>
          <table:table-cell table:number-columns-repeated="2"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https://estreetshuffle.com/index.php/wp-json/wp/v2/posts/32414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20220126014512</text:p>
          </table:table-cell>
          <table:table-cell office:value-type="string" calcext:value-type="string">
            <text:p>20220213210347</text:p>
          </table:table-cell>
          <table:table-cell table:number-columns-repeated="2"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https://estreetshuffle.com/index.php/wp-json/wp/v2/posts/32109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20220125235304</text:p>
          </table:table-cell>
          <table:table-cell office:value-type="string" calcext:value-type="string">
            <text:p>2022021321184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32246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20220205221630</text:p>
          </table:table-cell>
          <table:table-cell office:value-type="string" calcext:value-type="string">
            <text:p>2022021321190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31027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20220126021158</text:p>
          </table:table-cell>
          <table:table-cell office:value-type="string" calcext:value-type="string">
            <text:p>20220213211935</text:p>
          </table:table-cell>
          <table:table-cell table:number-columns-repeated="2"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https://estreetshuffle.com/index.php/wp-json/wp/v2/posts/32245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20220128052655</text:p>
          </table:table-cell>
          <table:table-cell office:value-type="string" calcext:value-type="string">
            <text:p>2022021322200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32363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20220204212609</text:p>
          </table:table-cell>
          <table:table-cell office:value-type="string" calcext:value-type="string">
            <text:p>2022021322203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31942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20220125172413</text:p>
          </table:table-cell>
          <table:table-cell office:value-type="string" calcext:value-type="string">
            <text:p>20220213222043</text:p>
          </table:table-cell>
          <table:table-cell table:number-columns-repeated="2"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https://estreetshuffle.com/index.php/wp-json/wp/v2/posts/31074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20220126082635</text:p>
          </table:table-cell>
          <table:table-cell office:value-type="string" calcext:value-type="string">
            <text:p>20220213222048</text:p>
          </table:table-cell>
          <table:table-cell table:number-columns-repeated="2"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https://estreetshuffle.com/index.php/wp-json/wp/v2/posts/32747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20220205101705</text:p>
          </table:table-cell>
          <table:table-cell office:value-type="string" calcext:value-type="string">
            <text:p>202202132221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32474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20220126082641</text:p>
          </table:table-cell>
          <table:table-cell office:value-type="string" calcext:value-type="string">
            <text:p>20220213222108</text:p>
          </table:table-cell>
          <table:table-cell table:number-columns-repeated="2"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https://estreetshuffle.com/index.php/wp-json/wp/v2/posts/31937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20220126161728</text:p>
          </table:table-cell>
          <table:table-cell office:value-type="string" calcext:value-type="string">
            <text:p>2022021322211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32674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20220205101702</text:p>
          </table:table-cell>
          <table:table-cell office:value-type="string" calcext:value-type="string">
            <text:p>20220213222132</text:p>
          </table:table-cell>
          <table:table-cell table:number-columns-repeated="2"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https://estreetshuffle.com/index.php/wp-json/wp/v2/posts/31936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20220126101415</text:p>
          </table:table-cell>
          <table:table-cell office:value-type="string" calcext:value-type="string">
            <text:p>20220213232009</text:p>
          </table:table-cell>
          <table:table-cell table:number-columns-repeated="2"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https://estreetshuffle.com/index.php/wp-json/wp/v2/posts/32113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20314032221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32614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20220213140111</text:p>
          </table:table-cell>
          <table:table-cell office:value-type="string" calcext:value-type="string">
            <text:p>2022031403372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24477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20314035219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33130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20314035242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32830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20314035244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32952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20314035245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33030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20314035249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32481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20314035251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32829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20314035255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32877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20314035323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33101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20314035332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32766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20220213211932</text:p>
          </table:table-cell>
          <table:table-cell office:value-type="string" calcext:value-type="string">
            <text:p>20220314040800</text:p>
          </table:table-cell>
          <table:table-cell table:number-columns-repeated="2"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https://estreetshuffle.com/index.php/wp-json/wp/v2/posts/27718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20220213211904</text:p>
          </table:table-cell>
          <table:table-cell office:value-type="string" calcext:value-type="string">
            <text:p>20220314042253</text:p>
          </table:table-cell>
          <table:table-cell table:number-columns-repeated="2"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https://estreetshuffle.com/index.php/wp-json/wp/v2/posts/32475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20314042259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32478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20314042328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33061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20314042329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32828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20314042331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32950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20314042335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32827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20314043834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8423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20324085733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33917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20421230811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33924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20423224032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34026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20425063015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33992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20220428062305</text:p>
          </table:table-cell>
          <table:table-cell office:value-type="string" calcext:value-type="string">
            <text:p>2022042806285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1015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20502014620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34530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20515065342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34582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20519140448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34327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20520122655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34590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20521152820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34540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20521153100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11634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20521212612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4355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20523073903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27455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20523120856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21788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20201117085824</text:p>
          </table:table-cell>
          <table:table-cell office:value-type="string" calcext:value-type="string">
            <text:p>20220523132508</text:p>
          </table:table-cell>
          <table:table-cell table:number-columns-repeated="2"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https://estreetshuffle.com/index.php/wp-json/wp/v2/posts/33507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20220523162023</text:p>
          </table:table-cell>
          <table:table-cell office:value-type="string" calcext:value-type="string">
            <text:p>2022052316245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15274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20523202717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33251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20524122751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://estreetshuffle.com/index.php/wp-json/wp/v2/posts/13045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20201101045344</text:p>
          </table:table-cell>
          <table:table-cell office:value-type="string" calcext:value-type="string">
            <text:p>20220524145822</text:p>
          </table:table-cell>
          <table:table-cell table:number-columns-repeated="2"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https://estreetshuffle.com/index.php/wp-json/wp/v2/posts/20492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20524235114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31938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20525074809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33127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20220525230957</text:p>
          </table:table-cell>
          <table:table-cell office:value-type="string" calcext:value-type="string">
            <text:p>20220525231007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://estreetshuffle.com/index.php/wp-json/wp/v2/posts/16552</text:p>
          </table:table-cell>
          <table:table-cell office:value-type="string" calcext:value-type="string">
            <text:p>text/html</text:p>
          </table:table-cell>
          <table:table-cell office:value-type="string" calcext:value-type="string">
            <text:p>20201112183545</text:p>
          </table:table-cell>
          <table:table-cell office:value-type="string" calcext:value-type="string">
            <text:p>20220528050621</text:p>
          </table:table-cell>
          <table:table-cell table:number-columns-repeated="2" office:value-type="string" calcext:value-type="string">
            <text:p>4</text:p>
          </table:table-cell>
        </table:table-row>
        <table:table-row table:style-name="ro1">
          <table:table-cell office:value-type="string" calcext:value-type="string">
            <text:p>https://estreetshuffle.com/index.php/wp-json/wp/v2/posts/24152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20528052215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25933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20210427204506</text:p>
          </table:table-cell>
          <table:table-cell office:value-type="string" calcext:value-type="string">
            <text:p>20220528192426</text:p>
          </table:table-cell>
          <table:table-cell table:number-columns-repeated="2"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https://estreetshuffle.com/index.php/wp-json/wp/v2/posts/27898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20529221708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35062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20605042832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35085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20610030143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35115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20611213815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27324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20612000652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11227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20612034155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35277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20612091900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14214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20613140436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35165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20220614091030</text:p>
          </table:table-cell>
          <table:table-cell office:value-type="string" calcext:value-type="string">
            <text:p>2022061409120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35074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20615140657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34745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20615165954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35284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20616124942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35354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20616152235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35287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20617130633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35289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20618125038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35292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20619115315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35180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20620042301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35311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20620115715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35230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20620195623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12003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20621115859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35314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20621123100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35321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20622120627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825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20623103620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31275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20220126005526</text:p>
          </table:table-cell>
          <table:table-cell office:value-type="string" calcext:value-type="string">
            <text:p>20220623122919</text:p>
          </table:table-cell>
          <table:table-cell table:number-columns-repeated="2"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https://estreetshuffle.com/index.php/wp-json/wp/v2/posts/35338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20623155327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35342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20624120306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4774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20624174322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35357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20626131955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35418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20627112717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35841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20220627120533</text:p>
          </table:table-cell>
          <table:table-cell office:value-type="string" calcext:value-type="string">
            <text:p>20220627124331</text:p>
          </table:table-cell>
          <table:table-cell table:number-columns-repeated="2"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https://estreetshuffle.com/index.php/wp-json/wp/v2/posts/2415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20628012019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2698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20628014112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35422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20628112521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35428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20629113431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35450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20701112144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35441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20701112829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451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20702015134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35455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20702114739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18728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20705084134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35543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20705122616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35514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20705145407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34840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20220614070716</text:p>
          </table:table-cell>
          <table:table-cell office:value-type="string" calcext:value-type="string">
            <text:p>20220705145408</text:p>
          </table:table-cell>
          <table:table-cell table:number-columns-repeated="2"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https://estreetshuffle.com/index.php/wp-json/wp/v2/posts/33402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20220522121351</text:p>
          </table:table-cell>
          <table:table-cell office:value-type="string" calcext:value-type="string">
            <text:p>20220705145415</text:p>
          </table:table-cell>
          <table:table-cell table:number-columns-repeated="2"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https://estreetshuffle.com/index.php/wp-json/wp/v2/posts/33817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20705145429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34350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20220521161836</text:p>
          </table:table-cell>
          <table:table-cell office:value-type="string" calcext:value-type="string">
            <text:p>20220705145434</text:p>
          </table:table-cell>
          <table:table-cell table:number-columns-repeated="2"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https://estreetshuffle.com/index.php/wp-json/wp/v2/posts/35034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20220613205058</text:p>
          </table:table-cell>
          <table:table-cell office:value-type="string" calcext:value-type="string">
            <text:p>20220705150905</text:p>
          </table:table-cell>
          <table:table-cell table:number-columns-repeated="2"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https://estreetshuffle.com/index.php/wp-json/wp/v2/posts/34234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20220525102336</text:p>
          </table:table-cell>
          <table:table-cell office:value-type="string" calcext:value-type="string">
            <text:p>20220705150912</text:p>
          </table:table-cell>
          <table:table-cell table:number-columns-repeated="2"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https://estreetshuffle.com/index.php/wp-json/wp/v2/posts/34622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20220521092617</text:p>
          </table:table-cell>
          <table:table-cell office:value-type="string" calcext:value-type="string">
            <text:p>20220705150914</text:p>
          </table:table-cell>
          <table:table-cell table:number-columns-repeated="2"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https://estreetshuffle.com/index.php/wp-json/wp/v2/posts/4272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20708221309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2421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20210130104023</text:p>
          </table:table-cell>
          <table:table-cell office:value-type="string" calcext:value-type="string">
            <text:p>20220709061811</text:p>
          </table:table-cell>
          <table:table-cell table:number-columns-repeated="2"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https://estreetshuffle.com/index.php/wp-json/wp/v2/posts/35727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20709113953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35567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20709194735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35550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20709234349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35521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20710031903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35903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20220629140009</text:p>
          </table:table-cell>
          <table:table-cell office:value-type="string" calcext:value-type="string">
            <text:p>20220710034512</text:p>
          </table:table-cell>
          <table:table-cell table:number-columns-repeated="2"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https://estreetshuffle.com/index.php/wp-json/wp/v2/posts/35730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20710115242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35780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20711112944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35233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20712001051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35806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20712112816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35862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20713195403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35868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20220714110855</text:p>
          </table:table-cell>
          <table:table-cell office:value-type="string" calcext:value-type="string">
            <text:p>20220714131329</text:p>
          </table:table-cell>
          <table:table-cell table:number-columns-repeated="2"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https://estreetshuffle.com/index.php/wp-json/wp/v2/posts/35642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20220617125148</text:p>
          </table:table-cell>
          <table:table-cell office:value-type="string" calcext:value-type="string">
            <text:p>20220715122531</text:p>
          </table:table-cell>
          <table:table-cell table:number-columns-repeated="2"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https://estreetshuffle.com/index.php/wp-json/wp/v2/posts/35872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20715131558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8271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20715212158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35920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20716114251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36023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20718110706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36169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20220719121857</text:p>
          </table:table-cell>
          <table:table-cell office:value-type="string" calcext:value-type="string">
            <text:p>20220720141756</text:p>
          </table:table-cell>
          <table:table-cell table:number-columns-repeated="2"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https://estreetshuffle.com/index.php/wp-json/wp/v2/posts/36026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20220719112609</text:p>
          </table:table-cell>
          <table:table-cell office:value-type="string" calcext:value-type="string">
            <text:p>20220721034757</text:p>
          </table:table-cell>
          <table:table-cell table:number-columns-repeated="2"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https://estreetshuffle.com/index.php/wp-json/wp/v2/posts/36054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20723113206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36031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20220720113336</text:p>
          </table:table-cell>
          <table:table-cell office:value-type="string" calcext:value-type="string">
            <text:p>20220723141012</text:p>
          </table:table-cell>
          <table:table-cell table:number-columns-repeated="2"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https://estreetshuffle.com/index.php/wp-json/wp/v2/posts/36164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20220711120507</text:p>
          </table:table-cell>
          <table:table-cell office:value-type="string" calcext:value-type="string">
            <text:p>20220723202927</text:p>
          </table:table-cell>
          <table:table-cell table:number-columns-repeated="2"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https://estreetshuffle.com/index.php/wp-json/wp/v2/posts/35845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20220701125242</text:p>
          </table:table-cell>
          <table:table-cell office:value-type="string" calcext:value-type="string">
            <text:p>20220724013600</text:p>
          </table:table-cell>
          <table:table-cell table:number-columns-repeated="2"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https://estreetshuffle.com/index.php/wp-json/wp/v2/posts/36008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20220707172513</text:p>
          </table:table-cell>
          <table:table-cell office:value-type="string" calcext:value-type="string">
            <text:p>20220724044521</text:p>
          </table:table-cell>
          <table:table-cell table:number-columns-repeated="2"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https://estreetshuffle.com/index.php/wp-json/wp/v2/posts/30008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20724060802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36318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20220717125051</text:p>
          </table:table-cell>
          <table:table-cell office:value-type="string" calcext:value-type="string">
            <text:p>20220724112136</text:p>
          </table:table-cell>
          <table:table-cell table:number-columns-repeated="2"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https://estreetshuffle.com/index.php/wp-json/wp/v2/posts/36063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20724121046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35073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20220709132659</text:p>
          </table:table-cell>
          <table:table-cell office:value-type="string" calcext:value-type="string">
            <text:p>20220724165253</text:p>
          </table:table-cell>
          <table:table-cell table:number-columns-repeated="2"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https://estreetshuffle.com/index.php/wp-json/wp/v2/posts/33514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20220625141710</text:p>
          </table:table-cell>
          <table:table-cell office:value-type="string" calcext:value-type="string">
            <text:p>20220725092427</text:p>
          </table:table-cell>
          <table:table-cell table:number-columns-repeated="2" office:value-type="string" calcext:value-type="string">
            <text:p>3</text:p>
          </table:table-cell>
        </table:table-row>
        <table:table-row table:style-name="ro1">
          <table:table-cell office:value-type="string" calcext:value-type="string">
            <text:p>https://estreetshuffle.com/index.php/wp-json/wp/v2/posts/36168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20725122952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36070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20726110932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35846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20727130817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36041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20220721120114</text:p>
          </table:table-cell>
          <table:table-cell office:value-type="string" calcext:value-type="string">
            <text:p>20220728024336</text:p>
          </table:table-cell>
          <table:table-cell table:number-columns-repeated="2"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https://estreetshuffle.com/index.php/wp-json/wp/v2/posts/36370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20220721122411</text:p>
          </table:table-cell>
          <table:table-cell office:value-type="string" calcext:value-type="string">
            <text:p>20220728064729</text:p>
          </table:table-cell>
          <table:table-cell table:number-columns-repeated="2"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https://estreetshuffle.com/index.php/wp-json/wp/v2/posts/36101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20728110453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36109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20729101900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36045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20220722123329</text:p>
          </table:table-cell>
          <table:table-cell office:value-type="string" calcext:value-type="string">
            <text:p>20220801223406</text:p>
          </table:table-cell>
          <table:table-cell table:number-columns-repeated="2"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https://estreetshuffle.com/index.php/wp-json/wp/v2/posts/16169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20802035051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36202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20803012000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35520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20220711074448</text:p>
          </table:table-cell>
          <table:table-cell office:value-type="string" calcext:value-type="string">
            <text:p>20220803145804</text:p>
          </table:table-cell>
          <table:table-cell table:number-columns-repeated="2"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https://estreetshuffle.com/index.php/wp-json/wp/v2/posts/35847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20220724114119</text:p>
          </table:table-cell>
          <table:table-cell office:value-type="string" calcext:value-type="string">
            <text:p>20220803145807</text:p>
          </table:table-cell>
          <table:table-cell table:number-columns-repeated="2"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https://estreetshuffle.com/index.php/wp-json/wp/v2/posts/32949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20803145810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36515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20220723113941</text:p>
          </table:table-cell>
          <table:table-cell office:value-type="string" calcext:value-type="string">
            <text:p>20220804055228</text:p>
          </table:table-cell>
          <table:table-cell table:number-columns-repeated="2"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https://estreetshuffle.com/index.php/wp-json/wp/v2/posts/36065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20220725120640</text:p>
          </table:table-cell>
          <table:table-cell office:value-type="string" calcext:value-type="string">
            <text:p>20220807125634</text:p>
          </table:table-cell>
          <table:table-cell table:number-columns-repeated="2"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https://estreetshuffle.com/index.php/wp-json/wp/v2/posts/36381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20807170236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36405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20808150952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36658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20808184305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36191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20810165441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36532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20811155629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16060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20811201122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7290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20812230802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34692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20220613232441</text:p>
          </table:table-cell>
          <table:table-cell office:value-type="string" calcext:value-type="string">
            <text:p>20220814052732</text:p>
          </table:table-cell>
          <table:table-cell table:number-columns-repeated="2"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https://estreetshuffle.com/index.php/wp-json/wp/v2/posts/36624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20220729131359</text:p>
          </table:table-cell>
          <table:table-cell office:value-type="string" calcext:value-type="string">
            <text:p>20220815015000</text:p>
          </table:table-cell>
          <table:table-cell table:number-columns-repeated="2"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https://estreetshuffle.com/index.php/wp-json/wp/v2/posts/36883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20815095826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29798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20220126005516</text:p>
          </table:table-cell>
          <table:table-cell office:value-type="string" calcext:value-type="string">
            <text:p>20220815141604</text:p>
          </table:table-cell>
          <table:table-cell table:number-columns-repeated="2" office:value-type="string" calcext:value-type="string">
            <text:p>3</text:p>
          </table:table-cell>
        </table:table-row>
        <table:table-row table:style-name="ro1">
          <table:table-cell office:value-type="string" calcext:value-type="string">
            <text:p>https://estreetshuffle.com/index.php/wp-json/wp/v2/posts/36411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20819070742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27046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20220705150918</text:p>
          </table:table-cell>
          <table:table-cell office:value-type="string" calcext:value-type="string">
            <text:p>20220822102014</text:p>
          </table:table-cell>
          <table:table-cell table:number-columns-repeated="2"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https://estreetshuffle.com/index.php/wp-json/wp/v2/posts/31243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20823003504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36440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20824203348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36967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20825000241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36458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20825162641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36327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20220804184109</text:p>
          </table:table-cell>
          <table:table-cell office:value-type="string" calcext:value-type="string">
            <text:p>20220826181544</text:p>
          </table:table-cell>
          <table:table-cell table:number-columns-repeated="2"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https://estreetshuffle.com/index.php/wp-json/wp/v2/posts/36444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20827120324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36583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20901065409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36708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20902194055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24580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20210131004926</text:p>
          </table:table-cell>
          <table:table-cell office:value-type="string" calcext:value-type="string">
            <text:p>20220905042137</text:p>
          </table:table-cell>
          <table:table-cell table:number-columns-repeated="2"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https://estreetshuffle.com/index.php/wp-json/wp/v2/posts/36740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20906090930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36827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20908093708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36936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20911053359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810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20913100210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36586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20915210720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3915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20917221626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37281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20919174341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2779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20919210951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30867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20220126021253</text:p>
          </table:table-cell>
          <table:table-cell office:value-type="string" calcext:value-type="string">
            <text:p>2022092301101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https://estreetshuffle.com/index.php/wp-json/wp/v2/posts/37540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20923172004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5407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20925172735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37053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20220917161858</text:p>
          </table:table-cell>
          <table:table-cell office:value-type="string" calcext:value-type="string">
            <text:p>2022092520404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37184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20930202807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4261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21001080339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36657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21002025752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35076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20220604095922</text:p>
          </table:table-cell>
          <table:table-cell office:value-type="string" calcext:value-type="string">
            <text:p>20221002175159</text:p>
          </table:table-cell>
          <table:table-cell table:number-columns-repeated="2"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https://estreetshuffle.com/index.php/wp-json/wp/v2/posts/37794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21005015009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3643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20210216141719</text:p>
          </table:table-cell>
          <table:table-cell office:value-type="string" calcext:value-type="string">
            <text:p>20221005020148</text:p>
          </table:table-cell>
          <table:table-cell table:number-columns-repeated="2"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https://estreetshuffle.com/index.php/wp-json/wp/v2/posts/37800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21006052946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32480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20220205164451</text:p>
          </table:table-cell>
          <table:table-cell office:value-type="string" calcext:value-type="string">
            <text:p>202210130319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https://estreetshuffle.com/index.php/wp-json/wp/v2/posts/38553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21023143607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38567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21026090006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35690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20220619130932</text:p>
          </table:table-cell>
          <table:table-cell office:value-type="string" calcext:value-type="string">
            <text:p>20221026095906</text:p>
          </table:table-cell>
          <table:table-cell table:number-columns-repeated="2" office:value-type="string" calcext:value-type="string">
            <text:p>3</text:p>
          </table:table-cell>
        </table:table-row>
        <table:table-row table:style-name="ro1">
          <table:table-cell office:value-type="string" calcext:value-type="string">
            <text:p>http://estreetshuffle.com/index.php/wp-json/wp/v2/posts/11449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20201102134523</text:p>
          </table:table-cell>
          <table:table-cell office:value-type="string" calcext:value-type="string">
            <text:p>20221028002634</text:p>
          </table:table-cell>
          <table:table-cell table:number-columns-repeated="2" office:value-type="string" calcext:value-type="string">
            <text:p>3</text:p>
          </table:table-cell>
        </table:table-row>
        <table:table-row table:style-name="ro1">
          <table:table-cell office:value-type="string" calcext:value-type="string">
            <text:p>https://estreetshuffle.com/index.php/wp-json/wp/v2/posts/27047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21028050744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38664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21029170742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38280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21029203325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22424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21030201943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38701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21103163023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5731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21103215035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24472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20210218203935</text:p>
          </table:table-cell>
          <table:table-cell office:value-type="string" calcext:value-type="string">
            <text:p>20221105095228</text:p>
          </table:table-cell>
          <table:table-cell table:number-columns-repeated="2"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https://estreetshuffle.com/index.php/wp-json/wp/v2/posts/31070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21105110626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38810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21106221807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34148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20220521190253</text:p>
          </table:table-cell>
          <table:table-cell office:value-type="string" calcext:value-type="string">
            <text:p>20221107082714</text:p>
          </table:table-cell>
          <table:table-cell table:number-columns-repeated="2"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http://estreetshuffle.com/index.php/wp-json/wp/v2/posts/2700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20201110053940</text:p>
          </table:table-cell>
          <table:table-cell office:value-type="string" calcext:value-type="string">
            <text:p>20221109073814</text:p>
          </table:table-cell>
          <table:table-cell table:number-columns-repeated="2" office:value-type="string" calcext:value-type="string">
            <text:p>3</text:p>
          </table:table-cell>
        </table:table-row>
        <table:table-row table:style-name="ro1">
          <table:table-cell office:value-type="string" calcext:value-type="string">
            <text:p>https://estreetshuffle.com/index.php/wp-json/wp/v2/posts/931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21112171157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12103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21115150309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11447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21116132611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39384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21126060759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89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21128202525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4780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20220522112511</text:p>
          </table:table-cell>
          <table:table-cell office:value-type="string" calcext:value-type="string">
            <text:p>20221129084216</text:p>
          </table:table-cell>
          <table:table-cell table:number-columns-repeated="2" office:value-type="string" calcext:value-type="string">
            <text:p>3</text:p>
          </table:table-cell>
        </table:table-row>
        <table:table-row table:style-name="ro1">
          <table:table-cell office:value-type="string" calcext:value-type="string">
            <text:p>https://estreetshuffle.com/index.php/wp-json/wp/v2/posts/39381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21201075653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3214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21202173643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39500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21202182920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39388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21202214957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1280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21204052509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39394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21206212807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://estreetshuffle.com/index.php/wp-json/wp/v2/posts/52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20200927160837</text:p>
          </table:table-cell>
          <table:table-cell office:value-type="string" calcext:value-type="string">
            <text:p>20221210004014</text:p>
          </table:table-cell>
          <table:table-cell table:number-columns-repeated="2" office:value-type="string" calcext:value-type="string">
            <text:p>4</text:p>
          </table:table-cell>
        </table:table-row>
        <table:table-row table:style-name="ro1">
          <table:table-cell office:value-type="string" calcext:value-type="string">
            <text:p>https://estreetshuffle.com/index.php/wp-json/wp/v2/posts/39573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21211221556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32110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20220125172422</text:p>
          </table:table-cell>
          <table:table-cell office:value-type="string" calcext:value-type="string">
            <text:p>20221212100719</text:p>
          </table:table-cell>
          <table:table-cell table:number-columns-repeated="2" office:value-type="string" calcext:value-type="string">
            <text:p>3</text:p>
          </table:table-cell>
        </table:table-row>
        <table:table-row table:style-name="ro1">
          <table:table-cell office:value-type="string" calcext:value-type="string">
            <text:p>https://estreetshuffle.com/index.php/wp-json/wp/v2/posts/7167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21212215025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4788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21214071029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5782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21214071030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39613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21214133153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39618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21214165951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12291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20220709054835</text:p>
          </table:table-cell>
          <table:table-cell office:value-type="string" calcext:value-type="string">
            <text:p>20221214192447</text:p>
          </table:table-cell>
          <table:table-cell table:number-columns-repeated="2"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https://estreetshuffle.com/index.php/wp-json/wp/v2/posts/29312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20210928230709</text:p>
          </table:table-cell>
          <table:table-cell office:value-type="string" calcext:value-type="string">
            <text:p>20221215231857</text:p>
          </table:table-cell>
          <table:table-cell table:number-columns-repeated="2"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https://estreetshuffle.com/index.php/wp-json/wp/v2/posts/39720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21219044151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27622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20210929013104</text:p>
          </table:table-cell>
          <table:table-cell office:value-type="string" calcext:value-type="string">
            <text:p>20221220060807</text:p>
          </table:table-cell>
          <table:table-cell table:number-columns-repeated="2"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https://estreetshuffle.com/index.php/wp-json/wp/v2/posts/19327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21221043418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39730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21221125655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19061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21226041055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39770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21226053942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397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21226215421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39774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21227023313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1284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21227135222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39885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21227135238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7402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21227151424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39807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21227171806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22287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21228021328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39892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21229121554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39895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21230191514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39881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21231040652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22584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21231200559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39944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30101010202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39767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30102064305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40221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30111045439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26870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30111064138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40037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30112084636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26871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30112150615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40631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30113110901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40744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30117131220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40715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30119184053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://estreetshuffle.com/index.php/wp-json/wp/v2/posts/19806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20200820130541</text:p>
          </table:table-cell>
          <table:table-cell office:value-type="string" calcext:value-type="string">
            <text:p>20230120171413</text:p>
          </table:table-cell>
          <table:table-cell table:number-columns-repeated="2" office:value-type="string" calcext:value-type="string">
            <text:p>3</text:p>
          </table:table-cell>
        </table:table-row>
        <table:table-row table:style-name="ro1">
          <table:table-cell office:value-type="string" calcext:value-type="string">
            <text:p>https://estreetshuffle.com/index.php/wp-json/wp/v2/posts/37842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30120171416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39221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20221130163415</text:p>
          </table:table-cell>
          <table:table-cell office:value-type="string" calcext:value-type="string">
            <text:p>20230120171421</text:p>
          </table:table-cell>
          <table:table-cell table:number-columns-repeated="2"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https://estreetshuffle.com/index.php/wp-json/wp/v2/posts/37160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20220917032057</text:p>
          </table:table-cell>
          <table:table-cell office:value-type="string" calcext:value-type="string">
            <text:p>20230120171423</text:p>
          </table:table-cell>
          <table:table-cell table:number-columns-repeated="2"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https://estreetshuffle.com/index.php/wp-json/wp/v2/posts/38922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30120171424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38923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30120171433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27451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30120171436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37007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20220825192604</text:p>
          </table:table-cell>
          <table:table-cell office:value-type="string" calcext:value-type="string">
            <text:p>20230120171438</text:p>
          </table:table-cell>
          <table:table-cell table:number-columns-repeated="2"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https://estreetshuffle.com/index.php/wp-json/wp/v2/posts/20109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30120171442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37943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30120171444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40201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30120171446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32951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20221002013649</text:p>
          </table:table-cell>
          <table:table-cell office:value-type="string" calcext:value-type="string">
            <text:p>20230120171506</text:p>
          </table:table-cell>
          <table:table-cell table:number-columns-repeated="2"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https://estreetshuffle.com/index.php/wp-json/wp/v2/posts/38034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30120171533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36533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20220725124811</text:p>
          </table:table-cell>
          <table:table-cell office:value-type="string" calcext:value-type="string">
            <text:p>20230120172924</text:p>
          </table:table-cell>
          <table:table-cell table:number-columns-repeated="2"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https://estreetshuffle.com/index.php/wp-json/wp/v2/posts/37606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30120172925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37140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20221108080311</text:p>
          </table:table-cell>
          <table:table-cell office:value-type="string" calcext:value-type="string">
            <text:p>20230120172928</text:p>
          </table:table-cell>
          <table:table-cell table:number-columns-repeated="2"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https://estreetshuffle.com/index.php/wp-json/wp/v2/posts/38925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20221201120113</text:p>
          </table:table-cell>
          <table:table-cell office:value-type="string" calcext:value-type="string">
            <text:p>20230120172931</text:p>
          </table:table-cell>
          <table:table-cell table:number-columns-repeated="2"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https://estreetshuffle.com/index.php/wp-json/wp/v2/posts/38856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30120172936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36656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30120174444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38355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30120174449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39588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30120174451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39250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20221130180918</text:p>
          </table:table-cell>
          <table:table-cell office:value-type="string" calcext:value-type="string">
            <text:p>20230120174453</text:p>
          </table:table-cell>
          <table:table-cell table:number-columns-repeated="2"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https://estreetshuffle.com/index.php/wp-json/wp/v2/posts/38924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20221201180516</text:p>
          </table:table-cell>
          <table:table-cell office:value-type="string" calcext:value-type="string">
            <text:p>20230120174458</text:p>
          </table:table-cell>
          <table:table-cell table:number-columns-repeated="2"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https://estreetshuffle.com/index.php/wp-json/wp/v2/posts/38509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30120174507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40747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30120214346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37691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30120214510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39970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20230114100443</text:p>
          </table:table-cell>
          <table:table-cell office:value-type="string" calcext:value-type="string">
            <text:p>20230120214511</text:p>
          </table:table-cell>
          <table:table-cell table:number-columns-repeated="2"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https://estreetshuffle.com/index.php/wp-json/wp/v2/posts/39131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20221202034654</text:p>
          </table:table-cell>
          <table:table-cell office:value-type="string" calcext:value-type="string">
            <text:p>20230120214519</text:p>
          </table:table-cell>
          <table:table-cell table:number-columns-repeated="2"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https://estreetshuffle.com/index.php/wp-json/wp/v2/posts/38577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30120214615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37176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20220905042612</text:p>
          </table:table-cell>
          <table:table-cell office:value-type="string" calcext:value-type="string">
            <text:p>20230120214629</text:p>
          </table:table-cell>
          <table:table-cell table:number-columns-repeated="2"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https://estreetshuffle.com/index.php/wp-json/wp/v2/posts/3494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20221106025700</text:p>
          </table:table-cell>
          <table:table-cell office:value-type="string" calcext:value-type="string">
            <text:p>20230120214635</text:p>
          </table:table-cell>
          <table:table-cell table:number-columns-repeated="2"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https://estreetshuffle.com/index.php/wp-json/wp/v2/posts/36371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30121001551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37439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20220916091104</text:p>
          </table:table-cell>
          <table:table-cell office:value-type="string" calcext:value-type="string">
            <text:p>20230121001559</text:p>
          </table:table-cell>
          <table:table-cell table:number-columns-repeated="2"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https://estreetshuffle.com/index.php/wp-json/wp/v2/posts/37037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30121001602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40824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30121123639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30554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30123185034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40633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30124153059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26869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30126040741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23068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20210220192606</text:p>
          </table:table-cell>
          <table:table-cell office:value-type="string" calcext:value-type="string">
            <text:p>20230127151745</text:p>
          </table:table-cell>
          <table:table-cell table:number-columns-repeated="2"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https://estreetshuffle.com/index.php/wp-json/wp/v2/posts/15842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30131110641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9386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30131171514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389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30202102645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6323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30202112911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40867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30204173802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41340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30211203636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41825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30227124809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41857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30302124122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41858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30303125635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41859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30304121847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41860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30305184958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14436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30306130755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41826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30307133607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2605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30308025643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41883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30308123707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41827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30308124037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1023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30309125031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1467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30309200856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18393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30311124304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42039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30311134955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42038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30317125508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42203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30318125532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42222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30320123319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42275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30321114101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42102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30321131700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42186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30322223845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42277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30323120325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42321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30324110519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42202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30324123545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42416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30326112711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42213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30326121749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42429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30328111628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4045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30328114252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5725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30328115645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6923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30328184258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10316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20220723194013</text:p>
          </table:table-cell>
          <table:table-cell office:value-type="string" calcext:value-type="string">
            <text:p>20230329063257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https://estreetshuffle.com/index.php/wp-json/wp/v2/posts/1143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30329075022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42276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30329134855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42431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30330021710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42468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30331095131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1145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30331111440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3565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30331112940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7801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30331114148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33129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30331114502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6252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30401112035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42470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30401113342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42322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30401115420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42469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30402094145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24640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20210202061650</text:p>
          </table:table-cell>
          <table:table-cell office:value-type="string" calcext:value-type="string">
            <text:p>20230402100724</text:p>
          </table:table-cell>
          <table:table-cell table:number-columns-repeated="2"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https://estreetshuffle.com/index.php/wp-json/wp/v2/posts/1139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30402110831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23067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30402111009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1217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30402163830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33405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30402170834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27148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30402233942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9735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30402235447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42555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30403113705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42556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30404121737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42430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30406050038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19326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30406110642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1986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30406111209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7400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30406111209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6183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30406111210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17116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30406111211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22773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20201116175252</text:p>
          </table:table-cell>
          <table:table-cell office:value-type="string" calcext:value-type="string">
            <text:p>20230406120334</text:p>
          </table:table-cell>
          <table:table-cell table:number-columns-repeated="2"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https://estreetshuffle.com/index.php/wp-json/wp/v2/posts/42558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30406190446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42559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30407113011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4353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30407113022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678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30407113749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15837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30408121131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7887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30409104927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37344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20220831180550</text:p>
          </table:table-cell>
          <table:table-cell office:value-type="string" calcext:value-type="string">
            <text:p>20230411081136</text:p>
          </table:table-cell>
          <table:table-cell table:number-columns-repeated="2" office:value-type="string" calcext:value-type="string">
            <text:p>4</text:p>
          </table:table-cell>
        </table:table-row>
        <table:table-row table:style-name="ro1">
          <table:table-cell office:value-type="string" calcext:value-type="string">
            <text:p>https://estreetshuffle.com/index.php/wp-json/wp/v2/posts/3569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30412112609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32610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20220314035334</text:p>
          </table:table-cell>
          <table:table-cell office:value-type="string" calcext:value-type="string">
            <text:p>20230415113500</text:p>
          </table:table-cell>
          <table:table-cell table:number-columns-repeated="2"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https://estreetshuffle.com/index.php/wp-json/wp/v2/posts/42665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30415121517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42747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30416120247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42666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30417115617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42791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30418113530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42793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30420101138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8280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30420143110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42745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30421123442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42748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30424180217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42864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30425110744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1555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30425123638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226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30426111658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42794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30428110415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42937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30428113023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194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30429101806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42938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30429112022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32365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20220126011237</text:p>
          </table:table-cell>
          <table:table-cell office:value-type="string" calcext:value-type="string">
            <text:p>20230429122339</text:p>
          </table:table-cell>
          <table:table-cell table:number-columns-repeated="2" office:value-type="string" calcext:value-type="string">
            <text:p>3</text:p>
          </table:table-cell>
        </table:table-row>
        <table:table-row table:style-name="ro1">
          <table:table-cell office:value-type="string" calcext:value-type="string">
            <text:p>https://estreetshuffle.com/index.php/wp-json/wp/v2/posts/42862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30430134407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1911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30501111508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42941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30502124724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43012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30503111257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43013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30504114558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42866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30504122048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43014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30505112032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5341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30506112703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18174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30506112705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43042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30506112707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7883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30506115032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7529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30506115206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15112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30507103514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25181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30507190501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43081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30508110007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43082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30509112405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16919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30509131023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43083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30510120913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43084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30511115439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43157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30512110332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1749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30512120346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2694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30512120348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1416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30513122617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26259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20210427093006</text:p>
          </table:table-cell>
          <table:table-cell office:value-type="string" calcext:value-type="string">
            <text:p>20230513123246</text:p>
          </table:table-cell>
          <table:table-cell table:number-columns-repeated="2"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https://estreetshuffle.com/index.php/wp-json/wp/v2/posts/26874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20210429141759</text:p>
          </table:table-cell>
          <table:table-cell office:value-type="string" calcext:value-type="string">
            <text:p>20230514002347</text:p>
          </table:table-cell>
          <table:table-cell table:number-columns-repeated="2"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https://estreetshuffle.com/index.php/wp-json/wp/v2/posts/43159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30514101551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10635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30517114503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22911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30519121101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43233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30520122258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43243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30522112106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15411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30522114024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43197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30523063547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10321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30523065343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43255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30524123308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43256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30525123818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43257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30526115617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43206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30526124204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26079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20210427061008</text:p>
          </table:table-cell>
          <table:table-cell office:value-type="string" calcext:value-type="string">
            <text:p>20230527122831</text:p>
          </table:table-cell>
          <table:table-cell table:number-columns-repeated="2" office:value-type="string" calcext:value-type="string">
            <text:p>3</text:p>
          </table:table-cell>
        </table:table-row>
        <table:table-row table:style-name="ro1">
          <table:table-cell office:value-type="string" calcext:value-type="string">
            <text:p>https://estreetshuffle.com/index.php/wp-json/wp/v2/posts/43247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30530123653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43280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30531115056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43394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30602112929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4790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30602113915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13624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20210203101435</text:p>
          </table:table-cell>
          <table:table-cell office:value-type="string" calcext:value-type="string">
            <text:p>20230602123504</text:p>
          </table:table-cell>
          <table:table-cell table:number-columns-repeated="2"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https://estreetshuffle.com/index.php/wp-json/wp/v2/posts/43450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30605112533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19495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30605115618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43274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30605120853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24641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20210130004248</text:p>
          </table:table-cell>
          <table:table-cell office:value-type="string" calcext:value-type="string">
            <text:p>20230605124146</text:p>
          </table:table-cell>
          <table:table-cell table:number-columns-repeated="2"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https://estreetshuffle.com/index.php/wp-json/wp/v2/posts/43451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30606114645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29187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20210928233833</text:p>
          </table:table-cell>
          <table:table-cell office:value-type="string" calcext:value-type="string">
            <text:p>20230607113932</text:p>
          </table:table-cell>
          <table:table-cell table:number-columns-repeated="2"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https://estreetshuffle.com/index.php/wp-json/wp/v2/posts/43475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30608100229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43395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30610063944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12486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30610063946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43477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30610065335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33338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30610105533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43478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30611002713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43407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30611105219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43540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30612165312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18295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20210130180234</text:p>
          </table:table-cell>
          <table:table-cell office:value-type="string" calcext:value-type="string">
            <text:p>20230612170620</text:p>
          </table:table-cell>
          <table:table-cell table:number-columns-repeated="2"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https://estreetshuffle.com/index.php/wp-json/wp/v2/posts/15047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30612173139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9379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30612173141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19328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30612173236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43452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30614133613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10411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30615161617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18175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30615185445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43539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30616063924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20598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30616073802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25187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30617200902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20495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30617200908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11225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20210426224320</text:p>
          </table:table-cell>
          <table:table-cell office:value-type="string" calcext:value-type="string">
            <text:p>20230618153244</text:p>
          </table:table-cell>
          <table:table-cell table:number-columns-repeated="2"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https://estreetshuffle.com/index.php/wp-json/wp/v2/posts/26452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20210426235841</text:p>
          </table:table-cell>
          <table:table-cell office:value-type="string" calcext:value-type="string">
            <text:p>2023062503314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https://estreetshuffle.com/index.php/wp-json/wp/v2/posts/43738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30625082440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7794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30625234831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43739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30626005317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43740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30626231134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43759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30628200854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43802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30701053411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11847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30705091001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23580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20210131233849</text:p>
          </table:table-cell>
          <table:table-cell office:value-type="string" calcext:value-type="string">
            <text:p>20230705105902</text:p>
          </table:table-cell>
          <table:table-cell table:number-columns-repeated="2" office:value-type="string" calcext:value-type="string">
            <text:p>3</text:p>
          </table:table-cell>
        </table:table-row>
        <table:table-row table:style-name="ro1">
          <table:table-cell office:value-type="string" calcext:value-type="string">
            <text:p>https://estreetshuffle.com/index.php/wp-json/wp/v2/posts/25186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20220701171252</text:p>
          </table:table-cell>
          <table:table-cell office:value-type="string" calcext:value-type="string">
            <text:p>20230708000536</text:p>
          </table:table-cell>
          <table:table-cell table:number-columns-repeated="2"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https://estreetshuffle.com/index.php/wp-json/wp/v2/posts/10976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20221028194450</text:p>
          </table:table-cell>
          <table:table-cell office:value-type="string" calcext:value-type="string">
            <text:p>20230708033245</text:p>
          </table:table-cell>
          <table:table-cell table:number-columns-repeated="2"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https://estreetshuffle.com/index.php/wp-json/wp/v2/posts/3210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20220710075251</text:p>
          </table:table-cell>
          <table:table-cell office:value-type="string" calcext:value-type="string">
            <text:p>20230708054836</text:p>
          </table:table-cell>
          <table:table-cell table:number-columns-repeated="2"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https://estreetshuffle.com/index.php/wp-json/wp/v2/posts/2611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30708060851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34693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20220614104208</text:p>
          </table:table-cell>
          <table:table-cell office:value-type="string" calcext:value-type="string">
            <text:p>20230709123407</text:p>
          </table:table-cell>
          <table:table-cell table:number-columns-repeated="2" office:value-type="string" calcext:value-type="string">
            <text:p>4</text:p>
          </table:table-cell>
        </table:table-row>
        <table:table-row table:style-name="ro1">
          <table:table-cell office:value-type="string" calcext:value-type="string">
            <text:p>https://estreetshuffle.com/index.php/wp-json/wp/v2/posts/22281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20210130074858</text:p>
          </table:table-cell>
          <table:table-cell office:value-type="string" calcext:value-type="string">
            <text:p>20230711121110</text:p>
          </table:table-cell>
          <table:table-cell table:number-columns-repeated="2"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https://estreetshuffle.com/index.php/wp-json/wp/v2/posts/3401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30711181515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4534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30712043203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28468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30712091539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1410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30712134220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8279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30713231546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7158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30715015308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2777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30715015311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6889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30715130243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287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30716043556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24642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20210427121143</text:p>
          </table:table-cell>
          <table:table-cell office:value-type="string" calcext:value-type="string">
            <text:p>20230716183509</text:p>
          </table:table-cell>
          <table:table-cell table:number-columns-repeated="2"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https://estreetshuffle.com/index.php/wp-json/wp/v2/posts/15844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30717080041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5413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30717154942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19927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30717205605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28462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30717214554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30561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20220126101427</text:p>
          </table:table-cell>
          <table:table-cell office:value-type="string" calcext:value-type="string">
            <text:p>20230720051615</text:p>
          </table:table-cell>
          <table:table-cell table:number-columns-repeated="2" office:value-type="string" calcext:value-type="string">
            <text:p>3</text:p>
          </table:table-cell>
        </table:table-row>
        <table:table-row table:style-name="ro1">
          <table:table-cell office:value-type="string" calcext:value-type="string">
            <text:p>https://estreetshuffle.com/index.php/wp-json/wp/v2/posts/4349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20210203084143</text:p>
          </table:table-cell>
          <table:table-cell office:value-type="string" calcext:value-type="string">
            <text:p>20230721114406</text:p>
          </table:table-cell>
          <table:table-cell table:number-columns-repeated="2"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https://estreetshuffle.com/index.php/wp-json/wp/v2/posts/11630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30721181943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5524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30721222402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14369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30722120611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3250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30725121559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7702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30726124257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12912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20220126094312</text:p>
          </table:table-cell>
          <table:table-cell office:value-type="string" calcext:value-type="string">
            <text:p>20230726124258</text:p>
          </table:table-cell>
          <table:table-cell table:number-columns-repeated="2"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https://estreetshuffle.com/index.php/wp-json/wp/v2/posts/13620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30726124258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5739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20201205065111</text:p>
          </table:table-cell>
          <table:table-cell office:value-type="string" calcext:value-type="string">
            <text:p>20230726124258</text:p>
          </table:table-cell>
          <table:table-cell table:number-columns-repeated="2"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https://estreetshuffle.com/index.php/wp-json/wp/v2/posts/5723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30726124300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44485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30802171006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25520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30803031052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6256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30803040727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18397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20220613190135</text:p>
          </table:table-cell>
          <table:table-cell office:value-type="string" calcext:value-type="string">
            <text:p>20230803162129</text:p>
          </table:table-cell>
          <table:table-cell table:number-columns-repeated="2"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https://estreetshuffle.com/index.php/wp-json/wp/v2/posts/14358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30809062924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23377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30814044032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8767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20230120171409</text:p>
          </table:table-cell>
          <table:table-cell office:value-type="string" calcext:value-type="string">
            <text:p>20230814200820</text:p>
          </table:table-cell>
          <table:table-cell table:number-columns-repeated="2"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https://estreetshuffle.com/index.php/wp-json/wp/v2/posts/3599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30814203920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19666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30815234057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545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30816034854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1564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20220822123853</text:p>
          </table:table-cell>
          <table:table-cell office:value-type="string" calcext:value-type="string">
            <text:p>20230816234517</text:p>
          </table:table-cell>
          <table:table-cell table:number-columns-repeated="2"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https://estreetshuffle.com/index.php/wp-json/wp/v2/posts/1774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30819004620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33406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30819014624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19925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30819124404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2607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30820140338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44571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30821224809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4448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30822124517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527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30826013653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22286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20201116183226</text:p>
          </table:table-cell>
          <table:table-cell office:value-type="string" calcext:value-type="string">
            <text:p>20230826121434</text:p>
          </table:table-cell>
          <table:table-cell table:number-columns-repeated="2"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https://estreetshuffle.com/index.php/wp-json/wp/v2/posts/7886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20220830042905</text:p>
          </table:table-cell>
          <table:table-cell office:value-type="string" calcext:value-type="string">
            <text:p>20230827220400</text:p>
          </table:table-cell>
          <table:table-cell table:number-columns-repeated="2"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https://estreetshuffle.com/index.php/wp-json/wp/v2/posts/23734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20210130232006</text:p>
          </table:table-cell>
          <table:table-cell office:value-type="string" calcext:value-type="string">
            <text:p>20230828121758</text:p>
          </table:table-cell>
          <table:table-cell table:number-columns-repeated="2"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https://estreetshuffle.com/index.php/wp-json/wp/v2/posts/3644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30828225928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23738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30902033641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3907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20230903044829</text:p>
          </table:table-cell>
          <table:table-cell office:value-type="string" calcext:value-type="string">
            <text:p>202309030449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13795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20230903102724</text:p>
          </table:table-cell>
          <table:table-cell office:value-type="string" calcext:value-type="string">
            <text:p>2023090310273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3902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30904051224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3913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20230906112507</text:p>
          </table:table-cell>
          <table:table-cell office:value-type="string" calcext:value-type="string">
            <text:p>2023090611252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44960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30909045848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2116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30913100451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6804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20231006140045</text:p>
          </table:table-cell>
          <table:table-cell office:value-type="string" calcext:value-type="string">
            <text:p>2023100614013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4718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31013133100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24153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20210130131313</text:p>
          </table:table-cell>
          <table:table-cell office:value-type="string" calcext:value-type="string">
            <text:p>20231013181509</text:p>
          </table:table-cell>
          <table:table-cell table:number-columns-repeated="2"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https://estreetshuffle.com/index.php/wp-json/wp/v2/posts/6921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31014094931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1644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31015210047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17117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31015215106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25700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31016020244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7798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31016113505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45745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20231019034213</text:p>
          </table:table-cell>
          <table:table-cell office:value-type="string" calcext:value-type="string">
            <text:p>20231019034216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13621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31024104057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19494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31024190131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13440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31024190133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45667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31030203711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45798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31031235944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5135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31102154620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11794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31105134337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16555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31105220900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22141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31106110945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9991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31107103119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12294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31108120602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30102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20220128032655</text:p>
          </table:table-cell>
          <table:table-cell office:value-type="string" calcext:value-type="string">
            <text:p>20231113062824</text:p>
          </table:table-cell>
          <table:table-cell table:number-columns-repeated="2"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https://estreetshuffle.com/index.php/wp-json/wp/v2/posts/46058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31113191548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13919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31114124333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46009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31114135637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13976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31115125414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1913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31116045356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1997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31117103328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7166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31118113414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2933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31118150221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29685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20210929024720</text:p>
          </table:table-cell>
          <table:table-cell office:value-type="string" calcext:value-type="string">
            <text:p>20231122022624</text:p>
          </table:table-cell>
          <table:table-cell table:number-columns-repeated="2"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https://estreetshuffle.com/index.php/wp-json/wp/v2/posts/10924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31124023236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24156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20210216045610</text:p>
          </table:table-cell>
          <table:table-cell office:value-type="string" calcext:value-type="string">
            <text:p>20231127184418</text:p>
          </table:table-cell>
          <table:table-cell table:number-columns-repeated="2"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https://estreetshuffle.com/index.php/wp-json/wp/v2/posts/46092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31128125719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19492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31130204451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19491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31201060136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12480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31203120839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21785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31214183800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23735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20210429183311</text:p>
          </table:table-cell>
          <table:table-cell office:value-type="string" calcext:value-type="string">
            <text:p>20231217035531</text:p>
          </table:table-cell>
          <table:table-cell table:number-columns-repeated="2" office:value-type="string" calcext:value-type="string">
            <text:p>3</text:p>
          </table:table-cell>
        </table:table-row>
        <table:table-row table:style-name="ro1">
          <table:table-cell office:value-type="string" calcext:value-type="string">
            <text:p>https://estreetshuffle.com/index.php/wp-json/wp/v2/posts/24474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31221222259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20491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31222035334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25804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31222135625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30172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31230124007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22285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40101141149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47334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40111053741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18568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40115000425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31028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40116121611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34460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20220520190958</text:p>
          </table:table-cell>
          <table:table-cell office:value-type="string" calcext:value-type="string">
            <text:p>20240118125457</text:p>
          </table:table-cell>
          <table:table-cell table:number-columns-repeated="2" office:value-type="string" calcext:value-type="string">
            <text:p>3</text:p>
          </table:table-cell>
        </table:table-row>
        <table:table-row table:style-name="ro1">
          <table:table-cell office:value-type="string" calcext:value-type="string">
            <text:p>https://estreetshuffle.com/index.php/wp-json/wp/v2/posts/8491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40119120031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5747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40120120116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2613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40120120119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7410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40120120120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2176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40125114604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3488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20220822090506</text:p>
          </table:table-cell>
          <table:table-cell office:value-type="string" calcext:value-type="string">
            <text:p>20240126123834</text:p>
          </table:table-cell>
          <table:table-cell table:number-columns-repeated="2"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https://estreetshuffle.com/index.php/wp-json/wp/v2/posts/32252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40128120046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14360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40131161329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11633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40204120140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24943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40204121230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48119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40204191306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48231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40216154544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48288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40217122708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48941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40229132012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48966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40304120115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48993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40307113452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48994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40307120108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48890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40308113010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49051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40310110100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7890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40310110108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48967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40312123511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1770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20210130052934</text:p>
          </table:table-cell>
          <table:table-cell office:value-type="string" calcext:value-type="string">
            <text:p>20240314200927</text:p>
          </table:table-cell>
          <table:table-cell table:number-columns-repeated="2"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https://estreetshuffle.com/index.php/wp-json/wp/v2/posts/48995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40315005625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7393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40315124011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17745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40316130253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1227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40316132902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4890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40317110803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49288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40319014926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49289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40319110048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49726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40320110051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1021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40321112533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6209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40321112834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49727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40321185340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49055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40321203332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49285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40322110548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49729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40323110057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49286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40323114636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49813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40324165014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927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40327035849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3659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40328153137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49728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40329102021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15113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40329184551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11792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40329184557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7788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40329184602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6679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40329191128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33407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20240329190123</text:p>
          </table:table-cell>
          <table:table-cell office:value-type="string" calcext:value-type="string">
            <text:p>20240331170617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49814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40401113532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49815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40402003000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50054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40402110057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49908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40404182507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464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40404201612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3663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40405053228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49907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40405170821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1331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40406171242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50055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40406200554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49904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40408154029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50056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40409083957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50106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40409110050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35382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40410064335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35373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20220621082121</text:p>
          </table:table-cell>
          <table:table-cell office:value-type="string" calcext:value-type="string">
            <text:p>2024041006444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https://estreetshuffle.com/index.php/wp-json/wp/v2/posts/50053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40412232148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50129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40415110036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50126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40416221603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50107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40417115521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50125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40418112423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25023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40421114047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13397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40426084430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28866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20230708073942</text:p>
          </table:table-cell>
          <table:table-cell office:value-type="string" calcext:value-type="string">
            <text:p>20240426120609</text:p>
          </table:table-cell>
          <table:table-cell table:number-columns-repeated="2"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https://estreetshuffle.com/index.php/wp-json/wp/v2/posts/6940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40426120613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28861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40426120617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29032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20240330121001</text:p>
          </table:table-cell>
          <table:table-cell office:value-type="string" calcext:value-type="string">
            <text:p>20240426120617</text:p>
          </table:table-cell>
          <table:table-cell table:number-columns-repeated="2"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https://estreetshuffle.com/index.php/wp-json/wp/v2/posts/50856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40515174026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44227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40515192921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44687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20230821223431</text:p>
          </table:table-cell>
          <table:table-cell office:value-type="string" calcext:value-type="string">
            <text:p>20240515192936</text:p>
          </table:table-cell>
          <table:table-cell table:number-columns-repeated="2"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https://estreetshuffle.com/index.php/wp-json/wp/v2/posts/43813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20230702233507</text:p>
          </table:table-cell>
          <table:table-cell office:value-type="string" calcext:value-type="string">
            <text:p>20240515193122</text:p>
          </table:table-cell>
          <table:table-cell table:number-columns-repeated="2"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https://estreetshuffle.com/index.php/wp-json/wp/v2/posts/46857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20231213014508</text:p>
          </table:table-cell>
          <table:table-cell office:value-type="string" calcext:value-type="string">
            <text:p>20240515193203</text:p>
          </table:table-cell>
          <table:table-cell table:number-columns-repeated="2"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https://estreetshuffle.com/index.php/wp-json/wp/v2/posts/44254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40515193307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48064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20240201120124</text:p>
          </table:table-cell>
          <table:table-cell office:value-type="string" calcext:value-type="string">
            <text:p>2024051519390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https://estreetshuffle.com/index.php/wp-json/wp/v2/posts/43922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20230709191030</text:p>
          </table:table-cell>
          <table:table-cell office:value-type="string" calcext:value-type="string">
            <text:p>20240515194037</text:p>
          </table:table-cell>
          <table:table-cell table:number-columns-repeated="2"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https://estreetshuffle.com/index.php/wp-json/wp/v2/posts/45335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40515194113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46411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20231203022530</text:p>
          </table:table-cell>
          <table:table-cell office:value-type="string" calcext:value-type="string">
            <text:p>20240515194146</text:p>
          </table:table-cell>
          <table:table-cell table:number-columns-repeated="2"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https://estreetshuffle.com/index.php/wp-json/wp/v2/posts/48229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40515194256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44543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20230809060334</text:p>
          </table:table-cell>
          <table:table-cell office:value-type="string" calcext:value-type="string">
            <text:p>20240515194522</text:p>
          </table:table-cell>
          <table:table-cell table:number-columns-repeated="2"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https://estreetshuffle.com/index.php/wp-json/wp/v2/posts/45112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40515194619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50464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40515194756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47086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20240329191116</text:p>
          </table:table-cell>
          <table:table-cell office:value-type="string" calcext:value-type="string">
            <text:p>20240515194909</text:p>
          </table:table-cell>
          <table:table-cell table:number-columns-repeated="2"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https://estreetshuffle.com/index.php/wp-json/wp/v2/posts/43542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40515195019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47309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20240106201650</text:p>
          </table:table-cell>
          <table:table-cell office:value-type="string" calcext:value-type="string">
            <text:p>20240515195103</text:p>
          </table:table-cell>
          <table:table-cell table:number-columns-repeated="2"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https://estreetshuffle.com/index.php/wp-json/wp/v2/posts/45462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40515195125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44446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40515195351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45057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20230910123747</text:p>
          </table:table-cell>
          <table:table-cell office:value-type="string" calcext:value-type="string">
            <text:p>20240515195420</text:p>
          </table:table-cell>
          <table:table-cell table:number-columns-repeated="2"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https://estreetshuffle.com/index.php/wp-json/wp/v2/posts/46412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40515195421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47279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20240103120100</text:p>
          </table:table-cell>
          <table:table-cell office:value-type="string" calcext:value-type="string">
            <text:p>20240515195517</text:p>
          </table:table-cell>
          <table:table-cell table:number-columns-repeated="2"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https://estreetshuffle.com/index.php/wp-json/wp/v2/posts/45534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40515195523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46754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20231213063045</text:p>
          </table:table-cell>
          <table:table-cell office:value-type="string" calcext:value-type="string">
            <text:p>20240515195529</text:p>
          </table:table-cell>
          <table:table-cell table:number-columns-repeated="2"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https://estreetshuffle.com/index.php/wp-json/wp/v2/posts/44059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20230708223316</text:p>
          </table:table-cell>
          <table:table-cell office:value-type="string" calcext:value-type="string">
            <text:p>20240515195542</text:p>
          </table:table-cell>
          <table:table-cell table:number-columns-repeated="2" office:value-type="string" calcext:value-type="string">
            <text:p>3</text:p>
          </table:table-cell>
        </table:table-row>
        <table:table-row table:style-name="ro1">
          <table:table-cell office:value-type="string" calcext:value-type="string">
            <text:p>https://estreetshuffle.com/index.php/wp-json/wp/v2/posts/48888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20240220120642</text:p>
          </table:table-cell>
          <table:table-cell office:value-type="string" calcext:value-type="string">
            <text:p>20240515195549</text:p>
          </table:table-cell>
          <table:table-cell table:number-columns-repeated="2"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https://estreetshuffle.com/index.php/wp-json/wp/v2/posts/50637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40515195601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44036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20230717194218</text:p>
          </table:table-cell>
          <table:table-cell office:value-type="string" calcext:value-type="string">
            <text:p>20240515195621</text:p>
          </table:table-cell>
          <table:table-cell table:number-columns-repeated="2"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https://estreetshuffle.com/index.php/wp-json/wp/v2/posts/43920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20230714134539</text:p>
          </table:table-cell>
          <table:table-cell office:value-type="string" calcext:value-type="string">
            <text:p>20240515195655</text:p>
          </table:table-cell>
          <table:table-cell table:number-columns-repeated="2"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https://estreetshuffle.com/index.php/wp-json/wp/v2/posts/45533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40515195851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46861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20231220124144</text:p>
          </table:table-cell>
          <table:table-cell office:value-type="string" calcext:value-type="string">
            <text:p>20240515195854</text:p>
          </table:table-cell>
          <table:table-cell table:number-columns-repeated="2"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https://estreetshuffle.com/index.php/wp-json/wp/v2/posts/47311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20240110043557</text:p>
          </table:table-cell>
          <table:table-cell office:value-type="string" calcext:value-type="string">
            <text:p>20240515195900</text:p>
          </table:table-cell>
          <table:table-cell table:number-columns-repeated="2"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https://estreetshuffle.com/index.php/wp-json/wp/v2/posts/48118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20240125120037</text:p>
          </table:table-cell>
          <table:table-cell office:value-type="string" calcext:value-type="string">
            <text:p>20240515195950</text:p>
          </table:table-cell>
          <table:table-cell table:number-columns-repeated="2"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https://estreetshuffle.com/index.php/wp-json/wp/v2/posts/48123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20240130120634</text:p>
          </table:table-cell>
          <table:table-cell office:value-type="string" calcext:value-type="string">
            <text:p>20240515200115</text:p>
          </table:table-cell>
          <table:table-cell table:number-columns-repeated="2"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https://estreetshuffle.com/index.php/wp-json/wp/v2/posts/45113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40515200120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46095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20231123021651</text:p>
          </table:table-cell>
          <table:table-cell office:value-type="string" calcext:value-type="string">
            <text:p>20240515200208</text:p>
          </table:table-cell>
          <table:table-cell table:number-columns-repeated="2"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https://estreetshuffle.com/index.php/wp-json/wp/v2/posts/44759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20230825052713</text:p>
          </table:table-cell>
          <table:table-cell office:value-type="string" calcext:value-type="string">
            <text:p>20240515200254</text:p>
          </table:table-cell>
          <table:table-cell table:number-columns-repeated="2"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https://estreetshuffle.com/index.php/wp-json/wp/v2/posts/50566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40515200945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45575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20231103195153</text:p>
          </table:table-cell>
          <table:table-cell office:value-type="string" calcext:value-type="string">
            <text:p>20240515201101</text:p>
          </table:table-cell>
          <table:table-cell table:number-columns-repeated="2"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https://estreetshuffle.com/index.php/wp-json/wp/v2/posts/45321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40515201211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45338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40515201225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47280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20240107165114</text:p>
          </table:table-cell>
          <table:table-cell office:value-type="string" calcext:value-type="string">
            <text:p>20240515201239</text:p>
          </table:table-cell>
          <table:table-cell table:number-columns-repeated="2"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https://estreetshuffle.com/index.php/wp-json/wp/v2/posts/47779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20240121120100</text:p>
          </table:table-cell>
          <table:table-cell office:value-type="string" calcext:value-type="string">
            <text:p>20240515201416</text:p>
          </table:table-cell>
          <table:table-cell table:number-columns-repeated="2"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https://estreetshuffle.com/index.php/wp-json/wp/v2/posts/45537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40515201456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46879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20231224231730</text:p>
          </table:table-cell>
          <table:table-cell office:value-type="string" calcext:value-type="string">
            <text:p>20240515201508</text:p>
          </table:table-cell>
          <table:table-cell table:number-columns-repeated="2"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https://estreetshuffle.com/index.php/wp-json/wp/v2/posts/48068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20240205175205</text:p>
          </table:table-cell>
          <table:table-cell office:value-type="string" calcext:value-type="string">
            <text:p>20240515201551</text:p>
          </table:table-cell>
          <table:table-cell table:number-columns-repeated="2"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https://estreetshuffle.com/index.php/wp-json/wp/v2/posts/48724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40515201643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46054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20231110155550</text:p>
          </table:table-cell>
          <table:table-cell office:value-type="string" calcext:value-type="string">
            <text:p>20240515201834</text:p>
          </table:table-cell>
          <table:table-cell table:number-columns-repeated="2"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https://estreetshuffle.com/index.php/wp-json/wp/v2/posts/45576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20231024125129</text:p>
          </table:table-cell>
          <table:table-cell office:value-type="string" calcext:value-type="string">
            <text:p>20240515201931</text:p>
          </table:table-cell>
          <table:table-cell table:number-columns-repeated="2"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https://estreetshuffle.com/index.php/wp-json/wp/v2/posts/44243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40515201956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45241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40515202011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45863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20231108135337</text:p>
          </table:table-cell>
          <table:table-cell office:value-type="string" calcext:value-type="string">
            <text:p>20240515202146</text:p>
          </table:table-cell>
          <table:table-cell table:number-columns-repeated="2"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https://estreetshuffle.com/index.php/wp-json/wp/v2/posts/48230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20240208112957</text:p>
          </table:table-cell>
          <table:table-cell office:value-type="string" calcext:value-type="string">
            <text:p>20240515202159</text:p>
          </table:table-cell>
          <table:table-cell table:number-columns-repeated="2"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https://estreetshuffle.com/index.php/wp-json/wp/v2/posts/47335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20240119122717</text:p>
          </table:table-cell>
          <table:table-cell office:value-type="string" calcext:value-type="string">
            <text:p>20240515202210</text:p>
          </table:table-cell>
          <table:table-cell table:number-columns-repeated="2"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https://estreetshuffle.com/index.php/wp-json/wp/v2/posts/48121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20240129120055</text:p>
          </table:table-cell>
          <table:table-cell office:value-type="string" calcext:value-type="string">
            <text:p>20240515202228</text:p>
          </table:table-cell>
          <table:table-cell table:number-columns-repeated="2"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https://estreetshuffle.com/index.php/wp-json/wp/v2/posts/44757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20230825080320</text:p>
          </table:table-cell>
          <table:table-cell office:value-type="string" calcext:value-type="string">
            <text:p>20240515202235</text:p>
          </table:table-cell>
          <table:table-cell table:number-columns-repeated="2"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https://estreetshuffle.com/index.php/wp-json/wp/v2/posts/44080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20230715234231</text:p>
          </table:table-cell>
          <table:table-cell office:value-type="string" calcext:value-type="string">
            <text:p>20240515202347</text:p>
          </table:table-cell>
          <table:table-cell table:number-columns-repeated="2"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https://estreetshuffle.com/index.php/wp-json/wp/v2/posts/44272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40515202551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44886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20230905092448</text:p>
          </table:table-cell>
          <table:table-cell office:value-type="string" calcext:value-type="string">
            <text:p>20240515202606</text:p>
          </table:table-cell>
          <table:table-cell table:number-columns-repeated="2"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https://estreetshuffle.com/index.php/wp-json/wp/v2/posts/46905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40515202612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46408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20231205040246</text:p>
          </table:table-cell>
          <table:table-cell office:value-type="string" calcext:value-type="string">
            <text:p>20240515202641</text:p>
          </table:table-cell>
          <table:table-cell table:number-columns-repeated="2"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https://estreetshuffle.com/index.php/wp-json/wp/v2/posts/46752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20231213134424</text:p>
          </table:table-cell>
          <table:table-cell office:value-type="string" calcext:value-type="string">
            <text:p>20240515202707</text:p>
          </table:table-cell>
          <table:table-cell table:number-columns-repeated="2"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https://estreetshuffle.com/index.php/wp-json/wp/v2/posts/44255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40515202721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44046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20230715134623</text:p>
          </table:table-cell>
          <table:table-cell office:value-type="string" calcext:value-type="string">
            <text:p>20240515202750</text:p>
          </table:table-cell>
          <table:table-cell table:number-columns-repeated="2"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https://estreetshuffle.com/index.php/wp-json/wp/v2/posts/46096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20231128155819</text:p>
          </table:table-cell>
          <table:table-cell office:value-type="string" calcext:value-type="string">
            <text:p>20240515202850</text:p>
          </table:table-cell>
          <table:table-cell table:number-columns-repeated="2"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https://estreetshuffle.com/index.php/wp-json/wp/v2/posts/48122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20240128120040</text:p>
          </table:table-cell>
          <table:table-cell office:value-type="string" calcext:value-type="string">
            <text:p>20240515202917</text:p>
          </table:table-cell>
          <table:table-cell table:number-columns-repeated="2"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https://estreetshuffle.com/index.php/wp-json/wp/v2/posts/45536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20231015071216</text:p>
          </table:table-cell>
          <table:table-cell office:value-type="string" calcext:value-type="string">
            <text:p>20240515202921</text:p>
          </table:table-cell>
          <table:table-cell table:number-columns-repeated="2"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https://estreetshuffle.com/index.php/wp-json/wp/v2/posts/44200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40515202954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46971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40515203021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45388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40515203137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45747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20231019155737</text:p>
          </table:table-cell>
          <table:table-cell office:value-type="string" calcext:value-type="string">
            <text:p>20240515203231</text:p>
          </table:table-cell>
          <table:table-cell table:number-columns-repeated="2"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https://estreetshuffle.com/index.php/wp-json/wp/v2/posts/47312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20240111154506</text:p>
          </table:table-cell>
          <table:table-cell office:value-type="string" calcext:value-type="string">
            <text:p>20240515203251</text:p>
          </table:table-cell>
          <table:table-cell table:number-columns-repeated="2"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https://estreetshuffle.com/index.php/wp-json/wp/v2/posts/45195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40515203254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47374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20240123125915</text:p>
          </table:table-cell>
          <table:table-cell office:value-type="string" calcext:value-type="string">
            <text:p>20240515203319</text:p>
          </table:table-cell>
          <table:table-cell table:number-columns-repeated="2"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https://estreetshuffle.com/index.php/wp-json/wp/v2/posts/50104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20240411141050</text:p>
          </table:table-cell>
          <table:table-cell office:value-type="string" calcext:value-type="string">
            <text:p>20240515203406</text:p>
          </table:table-cell>
          <table:table-cell table:number-columns-repeated="2"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https://estreetshuffle.com/index.php/wp-json/wp/v2/posts/45281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40515203417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45100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40515203452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44784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20230827135034</text:p>
          </table:table-cell>
          <table:table-cell office:value-type="string" calcext:value-type="string">
            <text:p>20240515203501</text:p>
          </table:table-cell>
          <table:table-cell table:number-columns-repeated="2"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https://estreetshuffle.com/index.php/wp-json/wp/v2/posts/46653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20231212123528</text:p>
          </table:table-cell>
          <table:table-cell office:value-type="string" calcext:value-type="string">
            <text:p>20240515203516</text:p>
          </table:table-cell>
          <table:table-cell table:number-columns-repeated="2"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https://estreetshuffle.com/index.php/wp-json/wp/v2/posts/47336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20240112120123</text:p>
          </table:table-cell>
          <table:table-cell office:value-type="string" calcext:value-type="string">
            <text:p>20240515203541</text:p>
          </table:table-cell>
          <table:table-cell table:number-columns-repeated="2"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https://estreetshuffle.com/index.php/wp-json/wp/v2/posts/44569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20230810044345</text:p>
          </table:table-cell>
          <table:table-cell office:value-type="string" calcext:value-type="string">
            <text:p>20240515203733</text:p>
          </table:table-cell>
          <table:table-cell table:number-columns-repeated="2"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https://estreetshuffle.com/index.php/wp-json/wp/v2/posts/46651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20231212050132</text:p>
          </table:table-cell>
          <table:table-cell office:value-type="string" calcext:value-type="string">
            <text:p>20240515203807</text:p>
          </table:table-cell>
          <table:table-cell table:number-columns-repeated="2"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https://estreetshuffle.com/index.php/wp-json/wp/v2/posts/48722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20240217211837</text:p>
          </table:table-cell>
          <table:table-cell office:value-type="string" calcext:value-type="string">
            <text:p>20240515203809</text:p>
          </table:table-cell>
          <table:table-cell table:number-columns-repeated="2"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https://estreetshuffle.com/index.php/wp-json/wp/v2/posts/46215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40515203833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46927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20240102212152</text:p>
          </table:table-cell>
          <table:table-cell office:value-type="string" calcext:value-type="string">
            <text:p>20240515203916</text:p>
          </table:table-cell>
          <table:table-cell table:number-columns-repeated="2"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https://estreetshuffle.com/index.php/wp-json/wp/v2/posts/47377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20240119120023</text:p>
          </table:table-cell>
          <table:table-cell office:value-type="string" calcext:value-type="string">
            <text:p>20240515203958</text:p>
          </table:table-cell>
          <table:table-cell table:number-columns-repeated="2"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https://estreetshuffle.com/index.php/wp-json/wp/v2/posts/45008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40515204115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48292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40515204309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44228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40515204312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45520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40515204332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46409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20231203040641</text:p>
          </table:table-cell>
          <table:table-cell office:value-type="string" calcext:value-type="string">
            <text:p>20240515204347</text:p>
          </table:table-cell>
          <table:table-cell table:number-columns-repeated="2"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https://estreetshuffle.com/index.php/wp-json/wp/v2/posts/45746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20231019110508</text:p>
          </table:table-cell>
          <table:table-cell office:value-type="string" calcext:value-type="string">
            <text:p>20240515204352</text:p>
          </table:table-cell>
          <table:table-cell table:number-columns-repeated="2"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https://estreetshuffle.com/index.php/wp-json/wp/v2/posts/45101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40515204406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47310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20240108082555</text:p>
          </table:table-cell>
          <table:table-cell office:value-type="string" calcext:value-type="string">
            <text:p>20240515204417</text:p>
          </table:table-cell>
          <table:table-cell table:number-columns-repeated="2"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https://estreetshuffle.com/index.php/wp-json/wp/v2/posts/44574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20230815042837</text:p>
          </table:table-cell>
          <table:table-cell office:value-type="string" calcext:value-type="string">
            <text:p>20240515204427</text:p>
          </table:table-cell>
          <table:table-cell table:number-columns-repeated="2"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https://estreetshuffle.com/index.php/wp-json/wp/v2/posts/43921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20230708122810</text:p>
          </table:table-cell>
          <table:table-cell office:value-type="string" calcext:value-type="string">
            <text:p>20240515204553</text:p>
          </table:table-cell>
          <table:table-cell table:number-columns-repeated="2"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https://estreetshuffle.com/index.php/wp-json/wp/v2/posts/46502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40515204601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45574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20231014092034</text:p>
          </table:table-cell>
          <table:table-cell office:value-type="string" calcext:value-type="string">
            <text:p>20240515204641</text:p>
          </table:table-cell>
          <table:table-cell table:number-columns-repeated="2"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https://estreetshuffle.com/index.php/wp-json/wp/v2/posts/46903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20231227121527</text:p>
          </table:table-cell>
          <table:table-cell office:value-type="string" calcext:value-type="string">
            <text:p>20240515204706</text:p>
          </table:table-cell>
          <table:table-cell table:number-columns-repeated="2"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https://estreetshuffle.com/index.php/wp-json/wp/v2/posts/45178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40515204913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44271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40515204956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46214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20231201001135</text:p>
          </table:table-cell>
          <table:table-cell office:value-type="string" calcext:value-type="string">
            <text:p>20240515205010</text:p>
          </table:table-cell>
          <table:table-cell table:number-columns-repeated="2"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https://estreetshuffle.com/index.php/wp-json/wp/v2/posts/46650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20231203203154</text:p>
          </table:table-cell>
          <table:table-cell office:value-type="string" calcext:value-type="string">
            <text:p>20240515205011</text:p>
          </table:table-cell>
          <table:table-cell table:number-columns-repeated="2"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https://estreetshuffle.com/index.php/wp-json/wp/v2/posts/45840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20231103112345</text:p>
          </table:table-cell>
          <table:table-cell office:value-type="string" calcext:value-type="string">
            <text:p>20240515205023</text:p>
          </table:table-cell>
          <table:table-cell table:number-columns-repeated="2"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https://estreetshuffle.com/index.php/wp-json/wp/v2/posts/46007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20231106195829</text:p>
          </table:table-cell>
          <table:table-cell office:value-type="string" calcext:value-type="string">
            <text:p>20240515205029</text:p>
          </table:table-cell>
          <table:table-cell table:number-columns-repeated="2"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https://estreetshuffle.com/index.php/wp-json/wp/v2/posts/44689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40515205111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48721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40515205122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47278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20240102120033</text:p>
          </table:table-cell>
          <table:table-cell office:value-type="string" calcext:value-type="string">
            <text:p>20240515205124</text:p>
          </table:table-cell>
          <table:table-cell table:number-columns-repeated="2"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https://estreetshuffle.com/index.php/wp-json/wp/v2/posts/46924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20240101055018</text:p>
          </table:table-cell>
          <table:table-cell office:value-type="string" calcext:value-type="string">
            <text:p>20240515205205</text:p>
          </table:table-cell>
          <table:table-cell table:number-columns-repeated="2"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https://estreetshuffle.com/index.php/wp-json/wp/v2/posts/44691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20230820231751</text:p>
          </table:table-cell>
          <table:table-cell office:value-type="string" calcext:value-type="string">
            <text:p>20240515205211</text:p>
          </table:table-cell>
          <table:table-cell table:number-columns-repeated="2"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https://estreetshuffle.com/index.php/wp-json/wp/v2/posts/45841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40515205238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48289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20240213114331</text:p>
          </table:table-cell>
          <table:table-cell office:value-type="string" calcext:value-type="string">
            <text:p>20240515205257</text:p>
          </table:table-cell>
          <table:table-cell table:number-columns-repeated="2"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https://estreetshuffle.com/index.php/wp-json/wp/v2/posts/45666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20231015181441</text:p>
          </table:table-cell>
          <table:table-cell office:value-type="string" calcext:value-type="string">
            <text:p>20240515205314</text:p>
          </table:table-cell>
          <table:table-cell table:number-columns-repeated="2"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https://estreetshuffle.com/index.php/wp-json/wp/v2/posts/45665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20231015003441</text:p>
          </table:table-cell>
          <table:table-cell office:value-type="string" calcext:value-type="string">
            <text:p>20240515205345</text:p>
          </table:table-cell>
          <table:table-cell table:number-columns-repeated="2"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https://estreetshuffle.com/index.php/wp-json/wp/v2/posts/48889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40515205436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46218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40515205448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45801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20231025184351</text:p>
          </table:table-cell>
          <table:table-cell office:value-type="string" calcext:value-type="string">
            <text:p>20240515205556</text:p>
          </table:table-cell>
          <table:table-cell table:number-columns-repeated="2"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https://estreetshuffle.com/index.php/wp-json/wp/v2/posts/44769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20230901113845</text:p>
          </table:table-cell>
          <table:table-cell office:value-type="string" calcext:value-type="string">
            <text:p>20240515205621</text:p>
          </table:table-cell>
          <table:table-cell table:number-columns-repeated="2"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https://estreetshuffle.com/index.php/wp-json/wp/v2/posts/48940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40515205647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50567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40515205756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46056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40515205846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46908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40515205920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44977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40515205941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45091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40515210003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46217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20231130182138</text:p>
          </table:table-cell>
          <table:table-cell office:value-type="string" calcext:value-type="string">
            <text:p>20240515210011</text:p>
          </table:table-cell>
          <table:table-cell table:number-columns-repeated="2"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https://estreetshuffle.com/index.php/wp-json/wp/v2/posts/44688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20230827135037</text:p>
          </table:table-cell>
          <table:table-cell office:value-type="string" calcext:value-type="string">
            <text:p>20240515210139</text:p>
          </table:table-cell>
          <table:table-cell table:number-columns-repeated="2"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https://estreetshuffle.com/index.php/wp-json/wp/v2/posts/45464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40515210139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46499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40515210144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48963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40515210206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44954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20230908112107</text:p>
          </table:table-cell>
          <table:table-cell office:value-type="string" calcext:value-type="string">
            <text:p>20240515210231</text:p>
          </table:table-cell>
          <table:table-cell table:number-columns-repeated="2"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https://estreetshuffle.com/index.php/wp-json/wp/v2/posts/46880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20231221074604</text:p>
          </table:table-cell>
          <table:table-cell office:value-type="string" calcext:value-type="string">
            <text:p>20240515210318</text:p>
          </table:table-cell>
          <table:table-cell table:number-columns-repeated="2"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https://estreetshuffle.com/index.php/wp-json/wp/v2/posts/44544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20230809193943</text:p>
          </table:table-cell>
          <table:table-cell office:value-type="string" calcext:value-type="string">
            <text:p>20240515210506</text:p>
          </table:table-cell>
          <table:table-cell table:number-columns-repeated="2"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https://estreetshuffle.com/index.php/wp-json/wp/v2/posts/46877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20231230113222</text:p>
          </table:table-cell>
          <table:table-cell office:value-type="string" calcext:value-type="string">
            <text:p>20240515210529</text:p>
          </table:table-cell>
          <table:table-cell table:number-columns-repeated="2"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https://estreetshuffle.com/index.php/wp-json/wp/v2/posts/44253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40515210553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41196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20230716095125</text:p>
          </table:table-cell>
          <table:table-cell office:value-type="string" calcext:value-type="string">
            <text:p>20240515210622</text:p>
          </table:table-cell>
          <table:table-cell table:number-columns-repeated="2" office:value-type="string" calcext:value-type="string">
            <text:p>3</text:p>
          </table:table-cell>
        </table:table-row>
        <table:table-row table:style-name="ro1">
          <table:table-cell office:value-type="string" calcext:value-type="string">
            <text:p>https://estreetshuffle.com/index.php/wp-json/wp/v2/posts/47778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20240127125156</text:p>
          </table:table-cell>
          <table:table-cell office:value-type="string" calcext:value-type="string">
            <text:p>20240515210638</text:p>
          </table:table-cell>
          <table:table-cell table:number-columns-repeated="2"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https://estreetshuffle.com/index.php/wp-json/wp/v2/posts/46904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40515210707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47337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20240114082451</text:p>
          </table:table-cell>
          <table:table-cell office:value-type="string" calcext:value-type="string">
            <text:p>20240515210735</text:p>
          </table:table-cell>
          <table:table-cell table:number-columns-repeated="2"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https://estreetshuffle.com/index.php/wp-json/wp/v2/posts/45389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40515210800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48067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20240208091358</text:p>
          </table:table-cell>
          <table:table-cell office:value-type="string" calcext:value-type="string">
            <text:p>20240515210809</text:p>
          </table:table-cell>
          <table:table-cell table:number-columns-repeated="2"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https://estreetshuffle.com/index.php/wp-json/wp/v2/posts/45336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40515210814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44758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20230826142928</text:p>
          </table:table-cell>
          <table:table-cell office:value-type="string" calcext:value-type="string">
            <text:p>20240515210848</text:p>
          </table:table-cell>
          <table:table-cell table:number-columns-repeated="2"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https://estreetshuffle.com/index.php/wp-json/wp/v2/posts/48291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20240220122408</text:p>
          </table:table-cell>
          <table:table-cell office:value-type="string" calcext:value-type="string">
            <text:p>20240515210950</text:p>
          </table:table-cell>
          <table:table-cell table:number-columns-repeated="2"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https://estreetshuffle.com/index.php/wp-json/wp/v2/posts/45007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40515211006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46652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20231212103444</text:p>
          </table:table-cell>
          <table:table-cell office:value-type="string" calcext:value-type="string">
            <text:p>20240515211353</text:p>
          </table:table-cell>
          <table:table-cell table:number-columns-repeated="2"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https://estreetshuffle.com/index.php/wp-json/wp/v2/posts/45802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20231031111809</text:p>
          </table:table-cell>
          <table:table-cell office:value-type="string" calcext:value-type="string">
            <text:p>20240515211408</text:p>
          </table:table-cell>
          <table:table-cell table:number-columns-repeated="2"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https://estreetshuffle.com/index.php/wp-json/wp/v2/posts/44570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20230811150018</text:p>
          </table:table-cell>
          <table:table-cell office:value-type="string" calcext:value-type="string">
            <text:p>20240515211449</text:p>
          </table:table-cell>
          <table:table-cell table:number-columns-repeated="2"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https://estreetshuffle.com/index.php/wp-json/wp/v2/posts/43803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20230702131143</text:p>
          </table:table-cell>
          <table:table-cell office:value-type="string" calcext:value-type="string">
            <text:p>20240515211501</text:p>
          </table:table-cell>
          <table:table-cell table:number-columns-repeated="2"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https://estreetshuffle.com/index.php/wp-json/wp/v2/posts/45799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20231028100837</text:p>
          </table:table-cell>
          <table:table-cell office:value-type="string" calcext:value-type="string">
            <text:p>20240515211502</text:p>
          </table:table-cell>
          <table:table-cell table:number-columns-repeated="2"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https://estreetshuffle.com/index.php/wp-json/wp/v2/posts/43824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20230707125716</text:p>
          </table:table-cell>
          <table:table-cell office:value-type="string" calcext:value-type="string">
            <text:p>20240515211641</text:p>
          </table:table-cell>
          <table:table-cell table:number-columns-repeated="2" office:value-type="string" calcext:value-type="string">
            <text:p>3</text:p>
          </table:table-cell>
        </table:table-row>
        <table:table-row table:style-name="ro1">
          <table:table-cell office:value-type="string" calcext:value-type="string">
            <text:p>https://estreetshuffle.com/index.php/wp-json/wp/v2/posts/46094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20231119124623</text:p>
          </table:table-cell>
          <table:table-cell office:value-type="string" calcext:value-type="string">
            <text:p>20240515211645</text:p>
          </table:table-cell>
          <table:table-cell table:number-columns-repeated="2"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https://estreetshuffle.com/index.php/wp-json/wp/v2/posts/44226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40515211653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46907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20231225121644</text:p>
          </table:table-cell>
          <table:table-cell office:value-type="string" calcext:value-type="string">
            <text:p>20240515211719</text:p>
          </table:table-cell>
          <table:table-cell table:number-columns-repeated="2"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https://estreetshuffle.com/index.php/wp-json/wp/v2/posts/48290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20240212120457</text:p>
          </table:table-cell>
          <table:table-cell office:value-type="string" calcext:value-type="string">
            <text:p>20240515211757</text:p>
          </table:table-cell>
          <table:table-cell table:number-columns-repeated="2"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https://estreetshuffle.com/index.php/wp-json/wp/v2/posts/47781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20240123120014</text:p>
          </table:table-cell>
          <table:table-cell office:value-type="string" calcext:value-type="string">
            <text:p>20240515211821</text:p>
          </table:table-cell>
          <table:table-cell table:number-columns-repeated="2"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https://estreetshuffle.com/index.php/wp-json/wp/v2/posts/47780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20240122121624</text:p>
          </table:table-cell>
          <table:table-cell office:value-type="string" calcext:value-type="string">
            <text:p>20240515212018</text:p>
          </table:table-cell>
          <table:table-cell table:number-columns-repeated="2"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https://estreetshuffle.com/index.php/wp-json/wp/v2/posts/45842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20231104111955</text:p>
          </table:table-cell>
          <table:table-cell office:value-type="string" calcext:value-type="string">
            <text:p>20240515212149</text:p>
          </table:table-cell>
          <table:table-cell table:number-columns-repeated="2"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https://estreetshuffle.com/index.php/wp-json/wp/v2/posts/46093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20231118124854</text:p>
          </table:table-cell>
          <table:table-cell office:value-type="string" calcext:value-type="string">
            <text:p>20240515212318</text:p>
          </table:table-cell>
          <table:table-cell table:number-columns-repeated="2"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https://estreetshuffle.com/index.php/wp-json/wp/v2/posts/46410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20231130175551</text:p>
          </table:table-cell>
          <table:table-cell office:value-type="string" calcext:value-type="string">
            <text:p>20240515212515</text:p>
          </table:table-cell>
          <table:table-cell table:number-columns-repeated="2"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https://estreetshuffle.com/index.php/wp-json/wp/v2/posts/46753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20231215131138</text:p>
          </table:table-cell>
          <table:table-cell office:value-type="string" calcext:value-type="string">
            <text:p>20240515212552</text:p>
          </table:table-cell>
          <table:table-cell table:number-columns-repeated="2"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https://estreetshuffle.com/index.php/wp-json/wp/v2/posts/44572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20230813214958</text:p>
          </table:table-cell>
          <table:table-cell office:value-type="string" calcext:value-type="string">
            <text:p>20240515212732</text:p>
          </table:table-cell>
          <table:table-cell table:number-columns-repeated="2"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https://estreetshuffle.com/index.php/wp-json/wp/v2/posts/46008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20231108022352</text:p>
          </table:table-cell>
          <table:table-cell office:value-type="string" calcext:value-type="string">
            <text:p>20240515212800</text:p>
          </table:table-cell>
          <table:table-cell table:number-columns-repeated="2"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https://estreetshuffle.com/index.php/wp-json/wp/v2/posts/45337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40515212833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47376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20240119103715</text:p>
          </table:table-cell>
          <table:table-cell office:value-type="string" calcext:value-type="string">
            <text:p>20240515212857</text:p>
          </table:table-cell>
          <table:table-cell table:number-columns-repeated="2"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https://estreetshuffle.com/index.php/wp-json/wp/v2/posts/44573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20230817123116</text:p>
          </table:table-cell>
          <table:table-cell office:value-type="string" calcext:value-type="string">
            <text:p>20240515213057</text:p>
          </table:table-cell>
          <table:table-cell table:number-columns-repeated="2"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https://estreetshuffle.com/index.php/wp-json/wp/v2/posts/48723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20240222230013</text:p>
          </table:table-cell>
          <table:table-cell office:value-type="string" calcext:value-type="string">
            <text:p>20240515213112</text:p>
          </table:table-cell>
          <table:table-cell table:number-columns-repeated="2"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https://estreetshuffle.com/index.php/wp-json/wp/v2/posts/48720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20240225191826</text:p>
          </table:table-cell>
          <table:table-cell office:value-type="string" calcext:value-type="string">
            <text:p>20240515213117</text:p>
          </table:table-cell>
          <table:table-cell table:number-columns-repeated="2"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https://estreetshuffle.com/index.php/wp-json/wp/v2/posts/47313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20240110103058</text:p>
          </table:table-cell>
          <table:table-cell office:value-type="string" calcext:value-type="string">
            <text:p>20240515213140</text:p>
          </table:table-cell>
          <table:table-cell table:number-columns-repeated="2"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https://estreetshuffle.com/index.php/wp-json/wp/v2/posts/46878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20231224124651</text:p>
          </table:table-cell>
          <table:table-cell office:value-type="string" calcext:value-type="string">
            <text:p>20240515213155</text:p>
          </table:table-cell>
          <table:table-cell table:number-columns-repeated="2"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https://estreetshuffle.com/index.php/wp-json/wp/v2/posts/50105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40515213251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46498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40515213302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43814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20230707000550</text:p>
          </table:table-cell>
          <table:table-cell office:value-type="string" calcext:value-type="string">
            <text:p>20240515213352</text:p>
          </table:table-cell>
          <table:table-cell table:number-columns-repeated="2"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https://estreetshuffle.com/index.php/wp-json/wp/v2/posts/46407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40515213402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46501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20231205123114</text:p>
          </table:table-cell>
          <table:table-cell office:value-type="string" calcext:value-type="string">
            <text:p>20240515213501</text:p>
          </table:table-cell>
          <table:table-cell table:number-columns-repeated="2"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https://estreetshuffle.com/index.php/wp-json/wp/v2/posts/45102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40515213503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48232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40515213523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48965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40515213531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44038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20230717200745</text:p>
          </table:table-cell>
          <table:table-cell office:value-type="string" calcext:value-type="string">
            <text:p>20240515213621</text:p>
          </table:table-cell>
          <table:table-cell table:number-columns-repeated="2"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https://estreetshuffle.com/index.php/wp-json/wp/v2/posts/45838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20231031131536</text:p>
          </table:table-cell>
          <table:table-cell office:value-type="string" calcext:value-type="string">
            <text:p>20240515213635</text:p>
          </table:table-cell>
          <table:table-cell table:number-columns-repeated="2"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https://estreetshuffle.com/index.php/wp-json/wp/v2/posts/44542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20230809052834</text:p>
          </table:table-cell>
          <table:table-cell office:value-type="string" calcext:value-type="string">
            <text:p>20240515213727</text:p>
          </table:table-cell>
          <table:table-cell table:number-columns-repeated="2"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https://estreetshuffle.com/index.php/wp-json/wp/v2/posts/43919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20230712113720</text:p>
          </table:table-cell>
          <table:table-cell office:value-type="string" calcext:value-type="string">
            <text:p>20240515213745</text:p>
          </table:table-cell>
          <table:table-cell table:number-columns-repeated="2"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https://estreetshuffle.com/index.php/wp-json/wp/v2/posts/47277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40515213757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46057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20231115122347</text:p>
          </table:table-cell>
          <table:table-cell office:value-type="string" calcext:value-type="string">
            <text:p>20240515214122</text:p>
          </table:table-cell>
          <table:table-cell table:number-columns-repeated="2"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https://estreetshuffle.com/index.php/wp-json/wp/v2/posts/32362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20230721231013</text:p>
          </table:table-cell>
          <table:table-cell office:value-type="string" calcext:value-type="string">
            <text:p>20240515214142</text:p>
          </table:table-cell>
          <table:table-cell table:number-columns-repeated="2" office:value-type="string" calcext:value-type="string">
            <text:p>3</text:p>
          </table:table-cell>
        </table:table-row>
        <table:table-row table:style-name="ro1">
          <table:table-cell office:value-type="string" calcext:value-type="string">
            <text:p>https://estreetshuffle.com/index.php/wp-json/wp/v2/posts/45056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40515214229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44783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20230902113214</text:p>
          </table:table-cell>
          <table:table-cell office:value-type="string" calcext:value-type="string">
            <text:p>20240515214257</text:p>
          </table:table-cell>
          <table:table-cell table:number-columns-repeated="2"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https://estreetshuffle.com/index.php/wp-json/wp/v2/posts/46755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20231214022714</text:p>
          </table:table-cell>
          <table:table-cell office:value-type="string" calcext:value-type="string">
            <text:p>20240515214358</text:p>
          </table:table-cell>
          <table:table-cell table:number-columns-repeated="2"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https://estreetshuffle.com/index.php/wp-json/wp/v2/posts/46216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20231128065820</text:p>
          </table:table-cell>
          <table:table-cell office:value-type="string" calcext:value-type="string">
            <text:p>20240515214510</text:p>
          </table:table-cell>
          <table:table-cell table:number-columns-repeated="2"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https://estreetshuffle.com/index.php/wp-json/wp/v2/posts/46876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20231224215219</text:p>
          </table:table-cell>
          <table:table-cell office:value-type="string" calcext:value-type="string">
            <text:p>20240515214614</text:p>
          </table:table-cell>
          <table:table-cell table:number-columns-repeated="2"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https://estreetshuffle.com/index.php/wp-json/wp/v2/posts/45463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20231012025841</text:p>
          </table:table-cell>
          <table:table-cell office:value-type="string" calcext:value-type="string">
            <text:p>20240515214629</text:p>
          </table:table-cell>
          <table:table-cell table:number-columns-repeated="2"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https://estreetshuffle.com/index.php/wp-json/wp/v2/posts/45839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20231103021948</text:p>
          </table:table-cell>
          <table:table-cell office:value-type="string" calcext:value-type="string">
            <text:p>20240515214644</text:p>
          </table:table-cell>
          <table:table-cell table:number-columns-repeated="2"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https://estreetshuffle.com/index.php/wp-json/wp/v2/posts/45862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20231107210849</text:p>
          </table:table-cell>
          <table:table-cell office:value-type="string" calcext:value-type="string">
            <text:p>20240515214830</text:p>
          </table:table-cell>
          <table:table-cell table:number-columns-repeated="2"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https://estreetshuffle.com/index.php/wp-json/wp/v2/posts/45009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20230907160356</text:p>
          </table:table-cell>
          <table:table-cell office:value-type="string" calcext:value-type="string">
            <text:p>20240515214923</text:p>
          </table:table-cell>
          <table:table-cell table:number-columns-repeated="2"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https://estreetshuffle.com/index.php/wp-json/wp/v2/posts/44976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20230914130049</text:p>
          </table:table-cell>
          <table:table-cell office:value-type="string" calcext:value-type="string">
            <text:p>20240515214951</text:p>
          </table:table-cell>
          <table:table-cell table:number-columns-repeated="2"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https://estreetshuffle.com/index.php/wp-json/wp/v2/posts/50128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20240425033109</text:p>
          </table:table-cell>
          <table:table-cell office:value-type="string" calcext:value-type="string">
            <text:p>20240515215007</text:p>
          </table:table-cell>
          <table:table-cell table:number-columns-repeated="2"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https://estreetshuffle.com/index.php/wp-json/wp/v2/posts/48120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40515215146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44199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20230717184330</text:p>
          </table:table-cell>
          <table:table-cell office:value-type="string" calcext:value-type="string">
            <text:p>20240515215450</text:p>
          </table:table-cell>
          <table:table-cell table:number-columns-repeated="2"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https://estreetshuffle.com/index.php/wp-json/wp/v2/posts/46973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20240104211336</text:p>
          </table:table-cell>
          <table:table-cell office:value-type="string" calcext:value-type="string">
            <text:p>20240515215458</text:p>
          </table:table-cell>
          <table:table-cell table:number-columns-repeated="2"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https://estreetshuffle.com/index.php/wp-json/wp/v2/posts/48892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20240302123534</text:p>
          </table:table-cell>
          <table:table-cell office:value-type="string" calcext:value-type="string">
            <text:p>20240515215507</text:p>
          </table:table-cell>
          <table:table-cell table:number-columns-repeated="2"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https://estreetshuffle.com/index.php/wp-json/wp/v2/posts/43815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20230704232140</text:p>
          </table:table-cell>
          <table:table-cell office:value-type="string" calcext:value-type="string">
            <text:p>20240515215640</text:p>
          </table:table-cell>
          <table:table-cell table:number-columns-repeated="2"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https://estreetshuffle.com/index.php/wp-json/wp/v2/posts/44487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20230804111546</text:p>
          </table:table-cell>
          <table:table-cell office:value-type="string" calcext:value-type="string">
            <text:p>20240515215754</text:p>
          </table:table-cell>
          <table:table-cell table:number-columns-repeated="2"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https://estreetshuffle.com/index.php/wp-json/wp/v2/posts/50127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20240413110109</text:p>
          </table:table-cell>
          <table:table-cell office:value-type="string" calcext:value-type="string">
            <text:p>20240515215758</text:p>
          </table:table-cell>
          <table:table-cell table:number-columns-repeated="2"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https://estreetshuffle.com/index.php/wp-json/wp/v2/posts/48066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20240204120138</text:p>
          </table:table-cell>
          <table:table-cell office:value-type="string" calcext:value-type="string">
            <text:p>20240515215956</text:p>
          </table:table-cell>
          <table:table-cell table:number-columns-repeated="2"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https://estreetshuffle.com/index.php/wp-json/wp/v2/posts/44005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20230710005054</text:p>
          </table:table-cell>
          <table:table-cell office:value-type="string" calcext:value-type="string">
            <text:p>20240515220004</text:p>
          </table:table-cell>
          <table:table-cell table:number-columns-repeated="2"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https://estreetshuffle.com/index.php/wp-json/wp/v2/posts/44541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20230806080113</text:p>
          </table:table-cell>
          <table:table-cell office:value-type="string" calcext:value-type="string">
            <text:p>20240515220126</text:p>
          </table:table-cell>
          <table:table-cell table:number-columns-repeated="2"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https://estreetshuffle.com/index.php/wp-json/wp/v2/posts/44690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20230825151605</text:p>
          </table:table-cell>
          <table:table-cell office:value-type="string" calcext:value-type="string">
            <text:p>20240515220142</text:p>
          </table:table-cell>
          <table:table-cell table:number-columns-repeated="2"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https://estreetshuffle.com/index.php/wp-json/wp/v2/posts/48937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40515220252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46649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20231203021711</text:p>
          </table:table-cell>
          <table:table-cell office:value-type="string" calcext:value-type="string">
            <text:p>20240515220254</text:p>
          </table:table-cell>
          <table:table-cell table:number-columns-repeated="2"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https://estreetshuffle.com/index.php/wp-json/wp/v2/posts/50103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20240411214508</text:p>
          </table:table-cell>
          <table:table-cell office:value-type="string" calcext:value-type="string">
            <text:p>20240515220355</text:p>
          </table:table-cell>
          <table:table-cell table:number-columns-repeated="2"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https://estreetshuffle.com/index.php/wp-json/wp/v2/posts/44885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20230904045408</text:p>
          </table:table-cell>
          <table:table-cell office:value-type="string" calcext:value-type="string">
            <text:p>20240515220428</text:p>
          </table:table-cell>
          <table:table-cell table:number-columns-repeated="2"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https://estreetshuffle.com/index.php/wp-json/wp/v2/posts/46862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20231221121802</text:p>
          </table:table-cell>
          <table:table-cell office:value-type="string" calcext:value-type="string">
            <text:p>20240515220601</text:p>
          </table:table-cell>
          <table:table-cell table:number-columns-repeated="2"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https://estreetshuffle.com/index.php/wp-json/wp/v2/posts/46855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20231214133212</text:p>
          </table:table-cell>
          <table:table-cell office:value-type="string" calcext:value-type="string">
            <text:p>20240515221016</text:p>
          </table:table-cell>
          <table:table-cell table:number-columns-repeated="2"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https://estreetshuffle.com/index.php/wp-json/wp/v2/posts/44767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20230830114244</text:p>
          </table:table-cell>
          <table:table-cell office:value-type="string" calcext:value-type="string">
            <text:p>20240515221058</text:p>
          </table:table-cell>
          <table:table-cell table:number-columns-repeated="2"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https://estreetshuffle.com/index.php/wp-json/wp/v2/posts/46856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20231217144648</text:p>
          </table:table-cell>
          <table:table-cell office:value-type="string" calcext:value-type="string">
            <text:p>20240515221237</text:p>
          </table:table-cell>
          <table:table-cell table:number-columns-repeated="2"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https://estreetshuffle.com/index.php/wp-json/wp/v2/posts/48065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20240209120708</text:p>
          </table:table-cell>
          <table:table-cell office:value-type="string" calcext:value-type="string">
            <text:p>20240515221420</text:p>
          </table:table-cell>
          <table:table-cell table:number-columns-repeated="2"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https://estreetshuffle.com/index.php/wp-json/wp/v2/posts/47338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20240114120026</text:p>
          </table:table-cell>
          <table:table-cell office:value-type="string" calcext:value-type="string">
            <text:p>20240515221910</text:p>
          </table:table-cell>
          <table:table-cell table:number-columns-repeated="2"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https://estreetshuffle.com/index.php/wp-json/wp/v2/posts/44236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40515222141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44060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20230716055553</text:p>
          </table:table-cell>
          <table:table-cell office:value-type="string" calcext:value-type="string">
            <text:p>20240515222216</text:p>
          </table:table-cell>
          <table:table-cell table:number-columns-repeated="2" office:value-type="string" calcext:value-type="string">
            <text:p>3</text:p>
          </table:table-cell>
        </table:table-row>
        <table:table-row table:style-name="ro1">
          <table:table-cell office:value-type="string" calcext:value-type="string">
            <text:p>https://estreetshuffle.com/index.php/wp-json/wp/v2/posts/47373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20240115191533</text:p>
          </table:table-cell>
          <table:table-cell office:value-type="string" calcext:value-type="string">
            <text:p>20240515223000</text:p>
          </table:table-cell>
          <table:table-cell table:number-columns-repeated="2"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https://estreetshuffle.com/index.php/wp-json/wp/v2/posts/47782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40515223314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48124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20240131120135</text:p>
          </table:table-cell>
          <table:table-cell office:value-type="string" calcext:value-type="string">
            <text:p>20240515223423</text:p>
          </table:table-cell>
          <table:table-cell table:number-columns-repeated="2"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https://estreetshuffle.com/index.php/wp-json/wp/v2/posts/45196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40515224827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46906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40515225808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48891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20240301130012</text:p>
          </table:table-cell>
          <table:table-cell office:value-type="string" calcext:value-type="string">
            <text:p>20240515230113</text:p>
          </table:table-cell>
          <table:table-cell table:number-columns-repeated="2"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https://estreetshuffle.com/index.php/wp-json/wp/v2/posts/45800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20231027082047</text:p>
          </table:table-cell>
          <table:table-cell office:value-type="string" calcext:value-type="string">
            <text:p>20240515233307</text:p>
          </table:table-cell>
          <table:table-cell table:number-columns-repeated="2"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https://estreetshuffle.com/index.php/wp-json/wp/v2/posts/44211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20230722123524</text:p>
          </table:table-cell>
          <table:table-cell office:value-type="string" calcext:value-type="string">
            <text:p>20240516020645</text:p>
          </table:table-cell>
          <table:table-cell table:number-columns-repeated="2"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https://estreetshuffle.com/index.php/wp-json/wp/v2/posts/44486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20230804170521</text:p>
          </table:table-cell>
          <table:table-cell office:value-type="string" calcext:value-type="string">
            <text:p>20240516032853</text:p>
          </table:table-cell>
          <table:table-cell table:number-columns-repeated="2"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https://estreetshuffle.com/index.php/wp-json/wp/v2/posts/44768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20230827062013</text:p>
          </table:table-cell>
          <table:table-cell office:value-type="string" calcext:value-type="string">
            <text:p>20240516034344</text:p>
          </table:table-cell>
          <table:table-cell table:number-columns-repeated="2"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https://estreetshuffle.com/index.php/wp-json/wp/v2/posts/46055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20231113105939</text:p>
          </table:table-cell>
          <table:table-cell office:value-type="string" calcext:value-type="string">
            <text:p>20240516095303</text:p>
          </table:table-cell>
          <table:table-cell table:number-columns-repeated="2"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https://estreetshuffle.com/index.php/wp-json/wp/v2/posts/45262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40516110957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45724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20231020010726</text:p>
          </table:table-cell>
          <table:table-cell office:value-type="string" calcext:value-type="string">
            <text:p>20240516160239</text:p>
          </table:table-cell>
          <table:table-cell table:number-columns-repeated="2"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https://estreetshuffle.com/index.php/wp-json/wp/v2/posts/44484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20230802180804</text:p>
          </table:table-cell>
          <table:table-cell office:value-type="string" calcext:value-type="string">
            <text:p>20240516164855</text:p>
          </table:table-cell>
          <table:table-cell table:number-columns-repeated="2"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https://estreetshuffle.com/index.php/wp-json/wp/v2/posts/45668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40516165821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45194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40516203358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45286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40517005139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47375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40517011503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48938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20240303192425</text:p>
          </table:table-cell>
          <table:table-cell office:value-type="string" calcext:value-type="string">
            <text:p>20240517023049</text:p>
          </table:table-cell>
          <table:table-cell table:number-columns-repeated="2"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https://estreetshuffle.com/index.php/wp-json/wp/v2/posts/44198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20230716225858</text:p>
          </table:table-cell>
          <table:table-cell office:value-type="string" calcext:value-type="string">
            <text:p>20240517034435</text:p>
          </table:table-cell>
          <table:table-cell table:number-columns-repeated="2"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https://estreetshuffle.com/index.php/wp-json/wp/v2/posts/46006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20231108113437</text:p>
          </table:table-cell>
          <table:table-cell office:value-type="string" calcext:value-type="string">
            <text:p>20240517042149</text:p>
          </table:table-cell>
          <table:table-cell table:number-columns-repeated="2"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https://estreetshuffle.com/index.php/wp-json/wp/v2/posts/46925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20240101080222</text:p>
          </table:table-cell>
          <table:table-cell office:value-type="string" calcext:value-type="string">
            <text:p>2024051704305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https://estreetshuffle.com/index.php/wp-json/wp/v2/posts/44938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20230907132736</text:p>
          </table:table-cell>
          <table:table-cell office:value-type="string" calcext:value-type="string">
            <text:p>20240517043805</text:p>
          </table:table-cell>
          <table:table-cell table:number-columns-repeated="2"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https://estreetshuffle.com/index.php/wp-json/wp/v2/posts/48964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40517044128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46926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20240101231718</text:p>
          </table:table-cell>
          <table:table-cell office:value-type="string" calcext:value-type="string">
            <text:p>20240517051627</text:p>
          </table:table-cell>
          <table:table-cell table:number-columns-repeated="2"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https://estreetshuffle.com/index.php/wp-json/wp/v2/posts/44887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40517062751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44077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20230720124130</text:p>
          </table:table-cell>
          <table:table-cell office:value-type="string" calcext:value-type="string">
            <text:p>20240517083027</text:p>
          </table:table-cell>
          <table:table-cell table:number-columns-repeated="2"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https://estreetshuffle.com/index.php/wp-json/wp/v2/posts/48939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20240305122926</text:p>
          </table:table-cell>
          <table:table-cell office:value-type="string" calcext:value-type="string">
            <text:p>20240517090011</text:p>
          </table:table-cell>
          <table:table-cell table:number-columns-repeated="2"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https://estreetshuffle.com/index.php/wp-json/wp/v2/posts/50768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40522131217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50940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40525045802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51151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40526193455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19185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40531210620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51264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40601173817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51265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40602205037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51507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40609235403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2114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20230825144902</text:p>
          </table:table-cell>
          <table:table-cell office:value-type="string" calcext:value-type="string">
            <text:p>20240613195659</text:p>
          </table:table-cell>
          <table:table-cell table:number-columns-repeated="2"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https://estreetshuffle.com/index.php/wp-json/wp/v2/posts/51719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40615164549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51720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40616190410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51803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40622181130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52013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40630211648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22425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20201116165226</text:p>
          </table:table-cell>
          <table:table-cell office:value-type="string" calcext:value-type="string">
            <text:p>20240705215149</text:p>
          </table:table-cell>
          <table:table-cell table:number-columns-repeated="2" office:value-type="string" calcext:value-type="string">
            <text:p>3</text:p>
          </table:table-cell>
        </table:table-row>
        <table:table-row table:style-name="ro1">
          <table:table-cell office:value-type="string" calcext:value-type="string">
            <text:p>https://estreetshuffle.com/index.php/wp-json/wp/v2/posts/15624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40717214702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7891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20230423122819</text:p>
          </table:table-cell>
          <table:table-cell office:value-type="string" calcext:value-type="string">
            <text:p>20240718013630</text:p>
          </table:table-cell>
          <table:table-cell table:number-columns-repeated="2"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https://estreetshuffle.com/index.php/wp-json/wp/v2/posts/27713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20210929054338</text:p>
          </table:table-cell>
          <table:table-cell office:value-type="string" calcext:value-type="string">
            <text:p>20240718040302</text:p>
          </table:table-cell>
          <table:table-cell table:number-columns-repeated="2"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https://estreetshuffle.com/index.php/wp-json/wp/v2/posts/53985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40814152833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53986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40815194631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5817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40816205456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3133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40816222948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36003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20220705124038</text:p>
          </table:table-cell>
          <table:table-cell office:value-type="string" calcext:value-type="string">
            <text:p>20240816222953</text:p>
          </table:table-cell>
          <table:table-cell table:number-columns-repeated="2" office:value-type="string" calcext:value-type="string">
            <text:p>3</text:p>
          </table:table-cell>
        </table:table-row>
        <table:table-row table:style-name="ro1">
          <table:table-cell office:value-type="string" calcext:value-type="string">
            <text:p>https://estreetshuffle.com/index.php/wp-json/wp/v2/posts/3131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20230707154128</text:p>
          </table:table-cell>
          <table:table-cell office:value-type="string" calcext:value-type="string">
            <text:p>20240816222954</text:p>
          </table:table-cell>
          <table:table-cell table:number-columns-repeated="2"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https://estreetshuffle.com/index.php/wp-json/wp/v2/posts/3190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40816223002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392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40816223012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54024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40912190507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54423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40914191850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54445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40918013355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54518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40924041334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24354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20210129231121</text:p>
          </table:table-cell>
          <table:table-cell office:value-type="string" calcext:value-type="string">
            <text:p>20241002135121</text:p>
          </table:table-cell>
          <table:table-cell table:number-columns-repeated="2"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https://estreetshuffle.com/index.php/wp-json/wp/v2/posts/4719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41003182553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4894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41004112257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30675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41105105846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54978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41110193301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49053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41115181053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25336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20210322221649</text:p>
          </table:table-cell>
          <table:table-cell office:value-type="string" calcext:value-type="string">
            <text:p>20241124193651</text:p>
          </table:table-cell>
          <table:table-cell table:number-columns-repeated="2"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http://estreetshuffle.com/index.php/wp-json/wp/v2/posts/20593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20200820123351</text:p>
          </table:table-cell>
          <table:table-cell office:value-type="string" calcext:value-type="string">
            <text:p>20241203233451</text:p>
          </table:table-cell>
          <table:table-cell table:number-columns-repeated="2" office:value-type="string" calcext:value-type="string">
            <text:p>3</text:p>
          </table:table-cell>
        </table:table-row>
        <table:table-row table:style-name="ro1">
          <table:table-cell office:value-type="string" calcext:value-type="string">
            <text:p>https://estreetshuffle.com/index.php/wp-json/wp/v2/posts/29186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20210928222533</text:p>
          </table:table-cell>
          <table:table-cell office:value-type="string" calcext:value-type="string">
            <text:p>20250119184712</text:p>
          </table:table-cell>
          <table:table-cell table:number-columns-repeated="2" office:value-type="string" calcext:value-type="string">
            <text:p>3</text:p>
          </table:table-cell>
        </table:table-row>
        <table:table-row table:style-name="ro1">
          <table:table-cell office:value-type="string" calcext:value-type="string">
            <text:p>https://estreetshuffle.com/index.php/wp-json/wp/v2/posts/52382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50119185002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39748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20230120174459</text:p>
          </table:table-cell>
          <table:table-cell office:value-type="string" calcext:value-type="string">
            <text:p>20250119185009</text:p>
          </table:table-cell>
          <table:table-cell table:number-columns-repeated="2"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https://estreetshuffle.com/index.php/wp-json/wp/v2/posts/43751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20230624164145</text:p>
          </table:table-cell>
          <table:table-cell office:value-type="string" calcext:value-type="string">
            <text:p>20250119185023</text:p>
          </table:table-cell>
          <table:table-cell table:number-columns-repeated="2" office:value-type="string" calcext:value-type="string">
            <text:p>3</text:p>
          </table:table-cell>
        </table:table-row>
        <table:table-row table:style-name="ro1">
          <table:table-cell office:value-type="string" calcext:value-type="string">
            <text:p>https://estreetshuffle.com/index.php/wp-json/wp/v2/posts/43459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20230610123642</text:p>
          </table:table-cell>
          <table:table-cell office:value-type="string" calcext:value-type="string">
            <text:p>20250119185024</text:p>
          </table:table-cell>
          <table:table-cell table:number-columns-repeated="2" office:value-type="string" calcext:value-type="string">
            <text:p>3</text:p>
          </table:table-cell>
        </table:table-row>
        <table:table-row table:style-name="ro1">
          <table:table-cell office:value-type="string" calcext:value-type="string">
            <text:p>https://estreetshuffle.com/index.php/wp-json/wp/v2/posts/41197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20240329184631</text:p>
          </table:table-cell>
          <table:table-cell office:value-type="string" calcext:value-type="string">
            <text:p>20250119185033</text:p>
          </table:table-cell>
          <table:table-cell table:number-columns-repeated="2"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https://estreetshuffle.com/index.php/wp-json/wp/v2/posts/47227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20240104143241</text:p>
          </table:table-cell>
          <table:table-cell office:value-type="string" calcext:value-type="string">
            <text:p>20250119185038</text:p>
          </table:table-cell>
          <table:table-cell table:number-columns-repeated="2" office:value-type="string" calcext:value-type="string">
            <text:p>4</text:p>
          </table:table-cell>
        </table:table-row>
        <table:table-row table:style-name="ro1">
          <table:table-cell office:value-type="string" calcext:value-type="string">
            <text:p>https://estreetshuffle.com/index.php/wp-json/wp/v2/posts/51596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20240716140158</text:p>
          </table:table-cell>
          <table:table-cell office:value-type="string" calcext:value-type="string">
            <text:p>20250119185047</text:p>
          </table:table-cell>
          <table:table-cell table:number-columns-repeated="2"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https://estreetshuffle.com/index.php/wp-json/wp/v2/posts/54391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50119185051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42585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20240329184606</text:p>
          </table:table-cell>
          <table:table-cell office:value-type="string" calcext:value-type="string">
            <text:p>20250119185057</text:p>
          </table:table-cell>
          <table:table-cell table:number-columns-repeated="2"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https://estreetshuffle.com/index.php/wp-json/wp/v2/posts/55578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50119185058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40850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20230120171413</text:p>
          </table:table-cell>
          <table:table-cell office:value-type="string" calcext:value-type="string">
            <text:p>2025011918510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https://estreetshuffle.com/index.php/wp-json/wp/v2/posts/55589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50119185137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55576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50119185141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40499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20230120214513</text:p>
          </table:table-cell>
          <table:table-cell office:value-type="string" calcext:value-type="string">
            <text:p>20250119185144</text:p>
          </table:table-cell>
          <table:table-cell table:number-columns-repeated="2"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https://estreetshuffle.com/index.php/wp-json/wp/v2/posts/55606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50119185152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52381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20240716140159</text:p>
          </table:table-cell>
          <table:table-cell office:value-type="string" calcext:value-type="string">
            <text:p>20250119185158</text:p>
          </table:table-cell>
          <table:table-cell table:number-columns-repeated="2"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https://estreetshuffle.com/index.php/wp-json/wp/v2/posts/41682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20230226130722</text:p>
          </table:table-cell>
          <table:table-cell office:value-type="string" calcext:value-type="string">
            <text:p>20250119185216</text:p>
          </table:table-cell>
          <table:table-cell table:number-columns-repeated="2" office:value-type="string" calcext:value-type="string">
            <text:p>3</text:p>
          </table:table-cell>
        </table:table-row>
        <table:table-row table:style-name="ro1">
          <table:table-cell office:value-type="string" calcext:value-type="string">
            <text:p>https://estreetshuffle.com/index.php/wp-json/wp/v2/posts/55607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50119185228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39396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20221130180919</text:p>
          </table:table-cell>
          <table:table-cell office:value-type="string" calcext:value-type="string">
            <text:p>20250119185237</text:p>
          </table:table-cell>
          <table:table-cell table:number-columns-repeated="2" office:value-type="string" calcext:value-type="string">
            <text:p>3</text:p>
          </table:table-cell>
        </table:table-row>
        <table:table-row table:style-name="ro1">
          <table:table-cell office:value-type="string" calcext:value-type="string">
            <text:p>https://estreetshuffle.com/index.php/wp-json/wp/v2/posts/42777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20240329191143</text:p>
          </table:table-cell>
          <table:table-cell office:value-type="string" calcext:value-type="string">
            <text:p>20250119185246</text:p>
          </table:table-cell>
          <table:table-cell table:number-columns-repeated="2"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https://estreetshuffle.com/index.php/wp-json/wp/v2/posts/39854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20230120171420</text:p>
          </table:table-cell>
          <table:table-cell office:value-type="string" calcext:value-type="string">
            <text:p>20250119185310</text:p>
          </table:table-cell>
          <table:table-cell table:number-columns-repeated="2"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https://estreetshuffle.com/index.php/wp-json/wp/v2/posts/41081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20240329185802</text:p>
          </table:table-cell>
          <table:table-cell office:value-type="string" calcext:value-type="string">
            <text:p>20250119185349</text:p>
          </table:table-cell>
          <table:table-cell table:number-columns-repeated="2"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https://estreetshuffle.com/index.php/wp-json/wp/v2/posts/40929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20230120214515</text:p>
          </table:table-cell>
          <table:table-cell office:value-type="string" calcext:value-type="string">
            <text:p>20250119185352</text:p>
          </table:table-cell>
          <table:table-cell table:number-columns-repeated="2"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https://estreetshuffle.com/index.php/wp-json/wp/v2/posts/55590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50119185353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55587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50119185442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40755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20230117131937</text:p>
          </table:table-cell>
          <table:table-cell office:value-type="string" calcext:value-type="string">
            <text:p>20250119185447</text:p>
          </table:table-cell>
          <table:table-cell table:number-columns-repeated="2" office:value-type="string" calcext:value-type="string">
            <text:p>3</text:p>
          </table:table-cell>
        </table:table-row>
        <table:table-row table:style-name="ro1">
          <table:table-cell office:value-type="string" calcext:value-type="string">
            <text:p>https://estreetshuffle.com/index.php/wp-json/wp/v2/posts/42140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20230403062026</text:p>
          </table:table-cell>
          <table:table-cell office:value-type="string" calcext:value-type="string">
            <text:p>20250119185527</text:p>
          </table:table-cell>
          <table:table-cell table:number-columns-repeated="2" office:value-type="string" calcext:value-type="string">
            <text:p>3</text:p>
          </table:table-cell>
        </table:table-row>
        <table:table-row table:style-name="ro1">
          <table:table-cell office:value-type="string" calcext:value-type="string">
            <text:p>https://estreetshuffle.com/index.php/wp-json/wp/v2/posts/39880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20230120214630</text:p>
          </table:table-cell>
          <table:table-cell office:value-type="string" calcext:value-type="string">
            <text:p>20250119185545</text:p>
          </table:table-cell>
          <table:table-cell table:number-columns-repeated="2"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https://estreetshuffle.com/index.php/wp-json/wp/v2/posts/55577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50119185626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55605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50119185636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41557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20240329191147</text:p>
          </table:table-cell>
          <table:table-cell office:value-type="string" calcext:value-type="string">
            <text:p>20250119185912</text:p>
          </table:table-cell>
          <table:table-cell table:number-columns-repeated="2"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https://estreetshuffle.com/index.php/wp-json/wp/v2/posts/51968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20240716141707</text:p>
          </table:table-cell>
          <table:table-cell office:value-type="string" calcext:value-type="string">
            <text:p>20250119190513</text:p>
          </table:table-cell>
          <table:table-cell table:number-columns-repeated="2"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https://estreetshuffle.com/index.php/wp-json/wp/v2/posts/32366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20220125235321</text:p>
          </table:table-cell>
          <table:table-cell office:value-type="string" calcext:value-type="string">
            <text:p>20250123112113</text:p>
          </table:table-cell>
          <table:table-cell table:number-columns-repeated="2" office:value-type="string" calcext:value-type="string">
            <text:p>3</text:p>
          </table:table-cell>
        </table:table-row>
        <table:table-row table:style-name="ro1">
          <table:table-cell office:value-type="string" calcext:value-type="string">
            <text:p>https://estreetshuffle.com/index.php/wp-json/wp/v2/posts/12717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20220125160531</text:p>
          </table:table-cell>
          <table:table-cell office:value-type="string" calcext:value-type="string">
            <text:p>20250123164910</text:p>
          </table:table-cell>
          <table:table-cell table:number-columns-repeated="2"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https://estreetshuffle.com/index.php/wp-json/wp/v2/posts/29797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20220125172152</text:p>
          </table:table-cell>
          <table:table-cell office:value-type="string" calcext:value-type="string">
            <text:p>2025012318570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https://estreetshuffle.com/index.php/wp-json/wp/v2/posts/55883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50217044714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55947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50217044937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55946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50217051429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55948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50217053414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55934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50217054005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55933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50217055326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55935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50217061038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55945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50217062128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55884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50217062149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55882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50217063446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6942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20220401143339</text:p>
          </table:table-cell>
          <table:table-cell office:value-type="string" calcext:value-type="string">
            <text:p>20250220013922</text:p>
          </table:table-cell>
          <table:table-cell table:number-columns-repeated="2"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https://estreetshuffle.com/index.php/wp-json/wp/v2/posts/5306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20220611144916</text:p>
          </table:table-cell>
          <table:table-cell office:value-type="string" calcext:value-type="string">
            <text:p>20250313162304</text:p>
          </table:table-cell>
          <table:table-cell table:number-columns-repeated="2"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https://estreetshuffle.com/index.php/wp-json/wp/v2/posts/56095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50313185731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56112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50313190418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56113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50313211615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56137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50313220157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56135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50313220302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56096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50313222213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56114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50313233228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56136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50314052250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56097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50315011958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56173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50317020617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55826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50318104841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56345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50405235016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56368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50405235024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56369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50405235025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56306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50405235035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56315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50405235114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56316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50405235153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56304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50405235706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56347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50405235809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56346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50405235814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56305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50406000145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16358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50406154528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5779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50413043413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56241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50418191731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55554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50418203948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55411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50418222502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55536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50419000234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56701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50511162233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56719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50512023813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56718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50512063252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19325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50512080725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56697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50512104928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56669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50512112557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56699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50512121213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56717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50512123441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56668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50512141631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56751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50512154026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56750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50513062959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56190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50513193419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56001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50522031041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26872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20210427154655</text:p>
          </table:table-cell>
          <table:table-cell office:value-type="string" calcext:value-type="string">
            <text:p>20250529005935</text:p>
          </table:table-cell>
          <table:table-cell table:number-columns-repeated="2" office:value-type="string" calcext:value-type="string">
            <text:p>3</text:p>
          </table:table-cell>
        </table:table-row>
        <table:table-row table:style-name="ro1">
          <table:table-cell office:value-type="string" calcext:value-type="string">
            <text:p>https://estreetshuffle.com/index.php/wp-json/wp/v2/posts/2773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20231102232719</text:p>
          </table:table-cell>
          <table:table-cell office:value-type="string" calcext:value-type="string">
            <text:p>20250603102645</text:p>
          </table:table-cell>
          <table:table-cell table:number-columns-repeated="2"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https://estreetshuffle.com/index.php/wp-json/wp/v2/posts/56993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50603102805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56994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50603102826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56902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50603102833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56837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50603102857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56835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50603103039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56856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50603103519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56836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50603103534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56858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50603103550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56901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50603103624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56857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50603103650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14569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20231102184829</text:p>
          </table:table-cell>
          <table:table-cell office:value-type="string" calcext:value-type="string">
            <text:p>20250605043321</text:p>
          </table:table-cell>
          <table:table-cell table:number-columns-repeated="2"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http://estreetshuffle.com/index.php/wp-json/wp/v2/posts/19805</text:p>
          </table:table-cell>
          <table:table-cell office:value-type="string" calcext:value-type="string">
            <text:p>text/html</text:p>
          </table:table-cell>
          <table:table-cell office:value-type="string" calcext:value-type="string">
            <text:p>20201119190115</text:p>
          </table:table-cell>
          <table:table-cell office:value-type="string" calcext:value-type="string">
            <text:p>20250608223847</text:p>
          </table:table-cell>
          <table:table-cell table:number-columns-repeated="2"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https://estreetshuffle.com/index.php/wp-json/wp/v2/posts/18560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50608225402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57514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50629041039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57178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50629044627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57179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50629051843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57120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50629053119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57122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50629053138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57513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50629055421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57180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50629060937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57181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50629073228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57121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50629074945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57110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20250629041338</text:p>
          </table:table-cell>
          <table:table-cell office:value-type="string" calcext:value-type="string">
            <text:p>2025062923102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57605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50706163923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57607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50706170555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57528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50706172249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57558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50706172317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57559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50706173022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57515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50706203646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57606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50707150751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57560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50708071633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1656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20231102232730</text:p>
          </table:table-cell>
          <table:table-cell office:value-type="string" calcext:value-type="string">
            <text:p>20250709051635</text:p>
          </table:table-cell>
          <table:table-cell table:number-columns-repeated="2"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http://estreetshuffle.com/index.php/wp-json/wp/v2/posts/21118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20201108103540</text:p>
          </table:table-cell>
          <table:table-cell office:value-type="string" calcext:value-type="string">
            <text:p>20250716081908</text:p>
          </table:table-cell>
          <table:table-cell table:number-columns-repeated="2" office:value-type="string" calcext:value-type="string">
            <text:p>3</text:p>
          </table:table-cell>
        </table:table-row>
        <table:table-row table:style-name="ro1">
          <table:table-cell office:value-type="string" calcext:value-type="string">
            <text:p>https://estreetshuffle.com/index.php/wp-json/wp/v2/posts/12477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50802214210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57894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50802214509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57868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50802214709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57851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50802214751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57814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50802214831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57813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50802214901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57895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50802215101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57850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50802215103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57873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50802215110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57867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50803112605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13442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50816120106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3399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50822054627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9986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50824231828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1646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20221204170819</text:p>
          </table:table-cell>
          <table:table-cell office:value-type="string" calcext:value-type="string">
            <text:p>20251115070520</text:p>
          </table:table-cell>
          <table:table-cell table:number-columns-repeated="2"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https://estreetshuffle.com/index.php/wp-json/wp/v2/posts/36849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20220808143305</text:p>
          </table:table-cell>
          <table:table-cell office:value-type="string" calcext:value-type="string">
            <text:p>20251115123119</text:p>
          </table:table-cell>
          <table:table-cell table:number-columns-repeated="2"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https://estreetshuffle.com/index.php/wp-json/wp/v2/posts/52380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20240704002548</text:p>
          </table:table-cell>
          <table:table-cell office:value-type="string" calcext:value-type="string">
            <text:p>20251115174823</text:p>
          </table:table-cell>
          <table:table-cell table:number-columns-repeated="2" office:value-type="string" calcext:value-type="string">
            <text:p>3</text:p>
          </table:table-cell>
        </table:table-row>
        <table:table-row table:style-name="ro1">
          <table:table-cell office:value-type="string" calcext:value-type="string">
            <text:p>https://estreetshuffle.com/index.php/wp-json/wp/v2/posts/1755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51116033325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25935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20210427170729</text:p>
          </table:table-cell>
          <table:table-cell office:value-type="string" calcext:value-type="string">
            <text:p>20251116072108</text:p>
          </table:table-cell>
          <table:table-cell table:number-columns-repeated="2"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https://estreetshuffle.com/index.php/wp-json/wp/v2/posts/55588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20250119185756</text:p>
          </table:table-cell>
          <table:table-cell office:value-type="string" calcext:value-type="string">
            <text:p>20251116073634</text:p>
          </table:table-cell>
          <table:table-cell table:number-columns-repeated="2"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https://estreetshuffle.com/index.php/wp-json/wp/v2/posts/16554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20210928222301</text:p>
          </table:table-cell>
          <table:table-cell office:value-type="string" calcext:value-type="string">
            <text:p>20251116125517</text:p>
          </table:table-cell>
          <table:table-cell table:number-columns-repeated="2"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https://estreetshuffle.com/index.php/wp-json/wp/v2/posts/5124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51116152735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34887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20220615104857</text:p>
          </table:table-cell>
          <table:table-cell office:value-type="string" calcext:value-type="string">
            <text:p>20251116152756</text:p>
          </table:table-cell>
          <table:table-cell table:number-columns-repeated="2"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https://estreetshuffle.com/index.php/wp-json/wp/v2/posts/23949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20210130090647</text:p>
          </table:table-cell>
          <table:table-cell office:value-type="string" calcext:value-type="string">
            <text:p>20251116173702</text:p>
          </table:table-cell>
          <table:table-cell table:number-columns-repeated="2"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https://estreetshuffle.com/index.php/wp-json/wp/v2/posts/29802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51116223802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52383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20240716140204</text:p>
          </table:table-cell>
          <table:table-cell office:value-type="string" calcext:value-type="string">
            <text:p>2025111708034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4</text:p>
          </table:table-cell>
        </table:table-row>
        <table:table-row table:style-name="ro1">
          <table:table-cell office:value-type="string" calcext:value-type="string">
            <text:p>https://estreetshuffle.com/index.php/wp-json/wp/v2/posts/12926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51117124242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30564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51117212327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://estreetshuffle.com/index.php/wp-json/wp/v2/posts/9626</text:p>
          </table:table-cell>
          <table:table-cell office:value-type="string" calcext:value-type="string">
            <text:p>text/html</text:p>
          </table:table-cell>
          <table:table-cell office:value-type="string" calcext:value-type="string">
            <text:p>20201112190700</text:p>
          </table:table-cell>
          <table:table-cell office:value-type="string" calcext:value-type="string">
            <text:p>20251118055839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6</text:p>
          </table:table-cell>
        </table:table-row>
        <table:table-row table:style-name="ro1">
          <table:table-cell office:value-type="string" calcext:value-type="string">
            <text:p>https://estreetshuffle.com/index.php/wp-json/wp/v2/posts/41893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20240330152608</text:p>
          </table:table-cell>
          <table:table-cell office:value-type="string" calcext:value-type="string">
            <text:p>20251118064238</text:p>
          </table:table-cell>
          <table:table-cell table:number-columns-repeated="2" office:value-type="string" calcext:value-type="string">
            <text:p>3</text:p>
          </table:table-cell>
        </table:table-row>
        <table:table-row table:style-name="ro1">
          <table:table-cell office:value-type="string" calcext:value-type="string">
            <text:p>https://estreetshuffle.com/index.php/wp-json/wp/v2/posts/31153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51118172837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1917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51118221523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40051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20221230200426</text:p>
          </table:table-cell>
          <table:table-cell office:value-type="string" calcext:value-type="string">
            <text:p>20251119042322</text:p>
          </table:table-cell>
          <table:table-cell table:number-columns-repeated="2" office:value-type="string" calcext:value-type="string">
            <text:p>4</text:p>
          </table:table-cell>
        </table:table-row>
        <table:table-row table:style-name="ro1">
          <table:table-cell office:value-type="string" calcext:value-type="string">
            <text:p>https://estreetshuffle.com/index.php/wp-json/wp/v2/posts/3752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20220910063305</text:p>
          </table:table-cell>
          <table:table-cell office:value-type="string" calcext:value-type="string">
            <text:p>20251119165535</text:p>
          </table:table-cell>
          <table:table-cell table:number-columns-repeated="2" office:value-type="string" calcext:value-type="string">
            <text:p>3</text:p>
          </table:table-cell>
        </table:table-row>
        <table:table-row table:style-name="ro1">
          <table:table-cell office:value-type="string" calcext:value-type="string">
            <text:p>https://estreetshuffle.com/index.php/wp-json/wp/v2/posts/5131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51121101503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26455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20210430012750</text:p>
          </table:table-cell>
          <table:table-cell office:value-type="string" calcext:value-type="string">
            <text:p>20251121172024</text:p>
          </table:table-cell>
          <table:table-cell table:number-columns-repeated="2"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https://estreetshuffle.com/index.php/wp-json/wp/v2/posts/56555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51122193802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30465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51125191554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22587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20201123123529</text:p>
          </table:table-cell>
          <table:table-cell office:value-type="string" calcext:value-type="string">
            <text:p>20251201054005</text:p>
          </table:table-cell>
          <table:table-cell table:number-columns-repeated="2"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https://estreetshuffle.com/index.php/wp-json/wp/v2/posts/32107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20220126011258</text:p>
          </table:table-cell>
          <table:table-cell office:value-type="string" calcext:value-type="string">
            <text:p>20251207235226</text:p>
          </table:table-cell>
          <table:table-cell table:number-columns-repeated="2" office:value-type="string" calcext:value-type="string">
            <text:p>3</text:p>
          </table:table-cell>
        </table:table-row>
        <table:table-row table:style-name="ro1">
          <table:table-cell office:value-type="string" calcext:value-type="string">
            <text:p>https://estreetshuffle.com/index.php/wp-json/wp/v2/posts/4536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20230408112122</text:p>
          </table:table-cell>
          <table:table-cell office:value-type="string" calcext:value-type="string">
            <text:p>20251208031635</text:p>
          </table:table-cell>
          <table:table-cell table:number-columns-repeated="2"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https://estreetshuffle.com/index.php/wp-json/wp/v2/posts/3026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51208100413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19180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51208154715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31274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20220126072802</text:p>
          </table:table-cell>
          <table:table-cell office:value-type="string" calcext:value-type="string">
            <text:p>20251208174411</text:p>
          </table:table-cell>
          <table:table-cell table:number-columns-repeated="2" office:value-type="string" calcext:value-type="string">
            <text:p>4</text:p>
          </table:table-cell>
        </table:table-row>
        <table:table-row table:style-name="ro1">
          <table:table-cell office:value-type="string" calcext:value-type="string">
            <text:p>https://estreetshuffle.com/index.php/wp-json/wp/v2/posts/32833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51217161253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30560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51231050721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16361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51231082547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29011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20210929045423</text:p>
          </table:table-cell>
          <table:table-cell office:value-type="string" calcext:value-type="string">
            <text:p>20251231122003</text:p>
          </table:table-cell>
          <table:table-cell table:number-columns-repeated="2"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https://estreetshuffle.com/index.php/wp-json/wp/v2/posts/13917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20230506112702</text:p>
          </table:table-cell>
          <table:table-cell office:value-type="string" calcext:value-type="string">
            <text:p>20251231142009</text:p>
          </table:table-cell>
          <table:table-cell table:number-columns-repeated="2"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https://estreetshuffle.com/index.php/wp-json/wp/v2/posts/30464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20220126161651</text:p>
          </table:table-cell>
          <table:table-cell office:value-type="string" calcext:value-type="string">
            <text:p>20251231165943</text:p>
          </table:table-cell>
          <table:table-cell table:number-columns-repeated="2"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https://estreetshuffle.com/index.php/wp-json/wp/v2/posts/27056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20220521052011</text:p>
          </table:table-cell>
          <table:table-cell office:value-type="string" calcext:value-type="string">
            <text:p>20251231183136</text:p>
          </table:table-cell>
          <table:table-cell table:number-columns-repeated="2"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https://estreetshuffle.com/index.php/wp-json/wp/v2/posts/23379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20210130193030</text:p>
          </table:table-cell>
          <table:table-cell office:value-type="string" calcext:value-type="string">
            <text:p>20251231205903</text:p>
          </table:table-cell>
          <table:table-cell table:number-columns-repeated="2"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https://estreetshuffle.com/index.php/wp-json/wp/v2/posts/32831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20220314033718</text:p>
          </table:table-cell>
          <table:table-cell office:value-type="string" calcext:value-type="string">
            <text:p>20251231212928</text:p>
          </table:table-cell>
          <table:table-cell table:number-columns-repeated="2"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https://estreetshuffle.com/index.php/wp-json/wp/v2/posts/15955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20221028074755</text:p>
          </table:table-cell>
          <table:table-cell office:value-type="string" calcext:value-type="string">
            <text:p>20260101144153</text:p>
          </table:table-cell>
          <table:table-cell table:number-columns-repeated="2"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https://estreetshuffle.com/index.php/wp-json/wp/v2/posts/63579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60101144333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63457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60101154528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39522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20221206004731</text:p>
          </table:table-cell>
          <table:table-cell office:value-type="string" calcext:value-type="string">
            <text:p>20260101212234</text:p>
          </table:table-cell>
          <table:table-cell table:number-columns-repeated="2" office:value-type="string" calcext:value-type="string">
            <text:p>3</text:p>
          </table:table-cell>
        </table:table-row>
        <table:table-row table:style-name="ro1">
          <table:table-cell office:value-type="string" calcext:value-type="string">
            <text:p>https://estreetshuffle.com/index.php/wp-json/wp/v2/posts/63456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60102005529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63578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60102040033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63423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60102050840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63424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60102114910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63727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60102174506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63425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60102195340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15621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20231106035702</text:p>
          </table:table-cell>
          <table:table-cell office:value-type="string" calcext:value-type="string">
            <text:p>20260103032145</text:p>
          </table:table-cell>
          <table:table-cell table:number-columns-repeated="2"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https://estreetshuffle.com/index.php/wp-json/wp/v2/posts/63455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60103040908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63422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60103065359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28465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60103130853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19064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60103133247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7818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60103161500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54352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20241122024216</text:p>
          </table:table-cell>
          <table:table-cell office:value-type="string" calcext:value-type="string">
            <text:p>20260103211827</text:p>
          </table:table-cell>
          <table:table-cell table:number-columns-repeated="2"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https://estreetshuffle.com/index.php/wp-json/wp/v2/posts/27896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60104105906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16720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20220627215937</text:p>
          </table:table-cell>
          <table:table-cell office:value-type="string" calcext:value-type="string">
            <text:p>20260104222851</text:p>
          </table:table-cell>
          <table:table-cell table:number-columns-repeated="2"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https://estreetshuffle.com/index.php/wp-json/wp/v2/posts/32613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20220314043826</text:p>
          </table:table-cell>
          <table:table-cell office:value-type="string" calcext:value-type="string">
            <text:p>20260105024335</text:p>
          </table:table-cell>
          <table:table-cell table:number-columns-repeated="2"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https://estreetshuffle.com/index.php/wp-json/wp/v2/posts/27626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20210611062441</text:p>
          </table:table-cell>
          <table:table-cell office:value-type="string" calcext:value-type="string">
            <text:p>20260105041307</text:p>
          </table:table-cell>
          <table:table-cell table:number-columns-repeated="2" office:value-type="string" calcext:value-type="string">
            <text:p>3</text:p>
          </table:table-cell>
        </table:table-row>
        <table:table-row table:style-name="ro1">
          <table:table-cell office:value-type="string" calcext:value-type="string">
            <text:p>https://estreetshuffle.com/index.php/wp-json/wp/v2/posts/58368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60105150143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22585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20230826034353</text:p>
          </table:table-cell>
          <table:table-cell office:value-type="string" calcext:value-type="string">
            <text:p>20260105190357</text:p>
          </table:table-cell>
          <table:table-cell table:number-columns-repeated="2"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https://estreetshuffle.com/index.php/wp-json/wp/v2/posts/21786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60105225333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56070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60110090146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13046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60112212345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30860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20220126005556</text:p>
          </table:table-cell>
          <table:table-cell office:value-type="string" calcext:value-type="string">
            <text:p>20260217044940</text:p>
          </table:table-cell>
          <table:table-cell table:number-columns-repeated="2" office:value-type="string" calcext:value-type="string">
            <text:p>3</text:p>
          </table:table-cell>
        </table:table-row>
        <table:table-row table:style-name="ro1">
          <table:table-cell office:value-type="string" calcext:value-type="string">
            <text:p>https://estreetshuffle.com/index.php/wp-json/wp/v2/posts/19053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60217140854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/31270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60217194805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ttps://estreetshuffle.com/index.php/wp-json/wp/v2/posts?categories=3326</text:p>
          </table:table-cell>
          <table:table-cell office:value-type="string" calcext:value-type="string">
            <text:p>application/json</text:p>
          </table:table-cell>
          <table:table-cell table:number-columns-repeated="2" office:value-type="string" calcext:value-type="string">
            <text:p>20260218075229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"1"]]</text:p>
          </table:table-cell>
        </table:table-row>
      </table:table>
      <table:named-expressions/>
      <table:database-ranges>
        <table:database-range table:name="__Anonymous_Sheet_DB__0" table:target-range-address="Sheet1.A1:Sheet1.F1380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1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5-13T15:19:28.379292300</meta:creation-date>
    <dc:date>2026-05-13T15:25:38.525458800</dc:date>
    <meta:editing-duration>PT6M10S</meta:editing-duration>
    <meta:editing-cycles>1</meta:editing-cycles>
    <meta:document-statistic meta:table-count="1" meta:cell-count="8280" meta:object-count="0"/>
    <meta:generator>LibreOffice/25.8.6.2$Windows_X86_64 LibreOffice_project/b4b39682cd9868fa725bc664aff94278d315bd04</meta:generator>
  </office:meta>
</office:document-meta>
</file>